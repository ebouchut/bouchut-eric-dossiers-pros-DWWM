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87000002D7DB578223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automatic-styles>
    <style:style style:name="Table1" style:family="table">
      <style:table-properties style:width="13.751cm" fo:margin-left="2.752cm" fo:margin-top="0cm" fo:margin-bottom="0cm" table:align="left" style:writing-mode="lr-tb"/>
    </style:style>
    <style:style style:name="Table1.A" style:family="table-column">
      <style:table-column-properties style:column-width="4.136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9.1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.049cm" fo:padding-bottom="0cm" fo:border="none" style:writing-mode="lr-tb"/>
    </style:style>
    <style:style style:name="Table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2" style:family="table">
      <style:table-properties style:width="17.254cm" fo:margin-left="-0.751cm" fo:margin-top="0cm" fo:margin-bottom="0cm" table:align="left" style:writing-mode="lr-tb"/>
    </style:style>
    <style:style style:name="Table2.A" style:family="table-column">
      <style:table-column-properties style:column-width="1.33cm"/>
    </style:style>
    <style:style style:name="Table2.B" style:family="table-column">
      <style:table-column-properties style:column-width="15.9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2.2" style:family="table-row">
      <style:table-row-properties style:min-row-height="0.101cm" fo:keep-together="auto"/>
    </style:style>
    <style:style style:name="Table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2.4" style:family="table-row">
      <style:table-row-properties style:min-row-height="2.499cm" fo:keep-together="auto"/>
    </style:style>
    <style:style style:name="Table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2.5" style:family="table-row">
      <style:table-row-properties style:min-row-height="0.801cm" fo:keep-together="auto"/>
    </style:style>
    <style:style style:name="Table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2.9" style:family="table-row">
      <style:table-row-properties style:min-row-height="0.3cm" fo:keep-together="auto"/>
    </style:style>
    <style:style style:name="Table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5" style:family="table">
      <style:table-properties style:width="17.254cm" fo:margin-left="-0.751cm" fo:margin-top="0cm" fo:margin-bottom="0cm" table:align="left" style:writing-mode="lr-tb"/>
    </style:style>
    <style:style style:name="Table5.A" style:family="table-column">
      <style:table-column-properties style:column-width="0.75cm"/>
    </style:style>
    <style:style style:name="Table5.B" style:family="table-column">
      <style:table-column-properties style:column-width="5.002cm"/>
    </style:style>
    <style:style style:name="Table5.C" style:family="table-column">
      <style:table-column-properties style:column-width="10.809cm"/>
    </style:style>
    <style:style style:name="Table5.D" style:family="table-column">
      <style:table-column-properties style:column-width="0.69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5.2" style:family="table-row">
      <style:table-row-properties style:min-row-height="0.035cm" fo:keep-together="auto"/>
    </style:style>
    <style:style style:name="Table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5.4" style:family="table-row">
      <style:table-row-properties style:min-row-height="0.199cm" fo:keep-together="auto"/>
    </style:style>
    <style:style style:name="Table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 style:writing-mode="lr-tb"/>
    </style:style>
    <style:style style:name="Table5.A5" style:family="table-cell">
      <style:table-cell-properties style:vertical-align="middle" fo:padding-left="0.191cm" fo:padding-right="0.191cm" fo:padding-top="0.101cm" fo:padding-bottom="0cm" fo:border-left="0.5pt solid #d9d9d9" fo:border-right="none" fo:border-top="none" fo:border-bottom="none" style:writing-mode="lr-tb"/>
    </style:style>
    <style:style style:name="Table5.B5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5.D5" style:family="table-cell">
      <style:table-cell-properties style:vertical-align="middle"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5.11" style:family="table-row">
      <style:table-row-properties style:min-row-height="2.2cm" fo:keep-together="auto"/>
    </style:style>
    <style:style style:name="Table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5.12" style:family="table-row">
      <style:table-row-properties style:min-row-height="1.101cm" fo:keep-together="auto"/>
    </style:style>
    <style:style style:name="Table5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6" style:family="table">
      <style:table-properties style:width="17.254cm" fo:margin-left="-0.751cm" fo:margin-top="0cm" fo:margin-bottom="0cm" table:align="left" style:writing-mode="lr-tb"/>
    </style:style>
    <style:style style:name="Table6.A" style:family="table-column">
      <style:table-column-properties style:column-width="0.499cm"/>
    </style:style>
    <style:style style:name="Table6.B" style:family="table-column">
      <style:table-column-properties style:column-width="14.252cm"/>
    </style:style>
    <style:style style:name="Table6.C" style:family="table-column">
      <style:table-column-properties style:column-width="0.753cm"/>
    </style:style>
    <style:style style:name="Table6.D" style:family="table-column">
      <style:table-column-properties style:column-width="1.7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6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6.3" style:family="table-row">
      <style:table-row-properties style:min-row-height="0.499cm" fo:keep-together="auto"/>
    </style:style>
    <style:style style:name="Table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6.C3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6.B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8" style:family="table-row">
      <style:table-row-properties style:min-row-height="0.3cm" fo:keep-together="auto"/>
    </style:style>
    <style:style style:name="Table6.A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B8" style:family="table-cell">
      <style:table-cell-properties fo:padding-left="0.191cm" fo:padding-right="0.191cm" fo:padding-top="0.101cm" fo:padding-bottom="0cm" fo:border="none" style:writing-mode="lr-tb"/>
    </style:style>
    <style:style style:name="Table6.C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6.A10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6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10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0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6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11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12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12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13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6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6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3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14" style:family="table-cell">
      <style:table-cell-properties fo:padding-left="0.191cm" fo:padding-right="0.191cm" fo:padding-top="0.101cm" fo:padding-bottom="0cm" fo:border="none" style:writing-mode="lr-tb"/>
    </style:style>
    <style:style style:name="Table6.B14" style:family="table-cell">
      <style:table-cell-properties fo:padding-left="0.191cm" fo:padding-right="0.191cm" fo:padding-top="0.101cm" fo:padding-bottom="0cm" fo:border="none" style:writing-mode="lr-tb"/>
    </style:style>
    <style:style style:name="Table6.C1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6.A15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6.C1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5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6.A1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6.C1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6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6.A18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6.C1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6.D1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8" style:family="table">
      <style:table-properties style:width="17.254cm" fo:margin-left="-0.751cm" fo:margin-top="0cm" fo:margin-bottom="0cm" table:align="left" style:writing-mode="lr-tb"/>
    </style:style>
    <style:style style:name="Table8.A" style:family="table-column">
      <style:table-column-properties style:column-width="4.253cm"/>
    </style:style>
    <style:style style:name="Table8.B" style:family="table-column">
      <style:table-column-properties style:column-width="0.25cm"/>
    </style:style>
    <style:style style:name="Table8.C" style:family="table-column">
      <style:table-column-properties style:column-width="0.663cm"/>
    </style:style>
    <style:style style:name="Table8.D" style:family="table-column">
      <style:table-column-properties style:column-width="0.085cm"/>
    </style:style>
    <style:style style:name="Table8.E" style:family="table-column">
      <style:table-column-properties style:column-width="0.917cm"/>
    </style:style>
    <style:style style:name="Table8.F" style:family="table-column">
      <style:table-column-properties style:column-width="2.083cm"/>
    </style:style>
    <style:style style:name="Table8.H" style:family="table-column">
      <style:table-column-properties style:column-width="1cm"/>
    </style:style>
    <style:style style:name="Table8.I" style:family="table-column">
      <style:table-column-properties style:column-width="7.752cm"/>
    </style:style>
    <style:style style:name="Table8.1" style:family="table-row">
      <style:table-row-properties style:min-row-height="1.199cm" fo:keep-together="auto"/>
    </style:style>
    <style:style style:name="Table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8.2" style:family="table-row">
      <style:table-row-properties style:min-row-height="0.7cm" fo:keep-together="auto"/>
    </style:style>
    <style:style style:name="Table8.3" style:family="table-row">
      <style:table-row-properties style:min-row-height="0.644cm" fo:keep-together="auto"/>
    </style:style>
    <style:style style:name="Table8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8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8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8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6" style:family="table-row">
      <style:table-row-properties style:min-row-height="7.999cm" fo:keep-together="auto"/>
    </style:style>
    <style:style style:name="Table8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8.7" style:family="table-row">
      <style:table-row-properties style:min-row-height="0.3cm" fo:keep-together="auto"/>
    </style:style>
    <style:style style:name="Table8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8.8" style:family="table-row">
      <style:table-row-properties style:min-row-height="0.466cm" fo:keep-together="auto"/>
    </style:style>
    <style:style style:name="Table8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9" style:family="table-row">
      <style:table-row-properties style:min-row-height="7.9cm" fo:keep-together="auto"/>
    </style:style>
    <style:style style:name="Table8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8.12" style:family="table-row">
      <style:table-row-properties style:min-row-height="5.001cm" fo:keep-together="auto"/>
    </style:style>
    <style:style style:name="Table8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8.13" style:family="table-row">
      <style:table-row-properties fo:keep-together="auto"/>
    </style:style>
    <style:style style:name="Table8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15" style:family="table-row">
      <style:table-row-properties style:min-row-height="0.199cm" fo:keep-together="auto"/>
    </style:style>
    <style:style style:name="Table8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8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8.16" style:family="table-row">
      <style:table-row-properties style:min-row-height="0.801cm" fo:keep-together="auto"/>
    </style:style>
    <style:style style:name="Table8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8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8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8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8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8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8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8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8.D19" style:family="table-cell">
      <style:table-cell-properties fo:padding-left="0.191cm" fo:padding-right="0.191cm" fo:padding-top="0.101cm" fo:padding-bottom="0cm" fo:border="none" style:writing-mode="lr-tb"/>
    </style:style>
    <style:style style:name="Table8.F19" style:family="table-cell">
      <style:table-cell-properties fo:padding-left="0.191cm" fo:padding-right="0.191cm" fo:padding-top="0.101cm" fo:padding-bottom="0cm" fo:border="none" style:writing-mode="lr-tb"/>
    </style:style>
    <style:style style:name="Table8.H19" style:family="table-cell">
      <style:table-cell-properties fo:padding-left="0.191cm" fo:padding-right="0.191cm" fo:padding-top="0.101cm" fo:padding-bottom="0cm" fo:border="none" style:writing-mode="lr-tb"/>
    </style:style>
    <style:style style:name="Table8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8.20" style:family="table-row">
      <style:table-row-properties style:min-row-height="0.4cm" fo:keep-together="auto"/>
    </style:style>
    <style:style style:name="Table8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23" style:family="table-row">
      <style:table-row-properties style:min-row-height="4.001cm" fo:keep-together="auto"/>
    </style:style>
    <style:style style:name="Table8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9" style:family="table">
      <style:table-properties style:width="17.302cm" fo:margin-left="-0.799cm" fo:margin-top="0cm" fo:margin-bottom="0cm" fo:break-before="page" table:align="left" style:writing-mode="lr-tb"/>
    </style:style>
    <style:style style:name="Table9.A" style:family="table-column">
      <style:table-column-properties style:column-width="4.3cm"/>
    </style:style>
    <style:style style:name="Table9.B" style:family="table-column">
      <style:table-column-properties style:column-width="0.24cm"/>
    </style:style>
    <style:style style:name="Table9.C" style:family="table-column">
      <style:table-column-properties style:column-width="0.66cm"/>
    </style:style>
    <style:style style:name="Table9.D" style:family="table-column">
      <style:table-column-properties style:column-width="0.101cm"/>
    </style:style>
    <style:style style:name="Table9.E" style:family="table-column">
      <style:table-column-properties style:column-width="0.9cm"/>
    </style:style>
    <style:style style:name="Table9.F" style:family="table-column">
      <style:table-column-properties style:column-width="2.101cm"/>
    </style:style>
    <style:style style:name="Table9.H" style:family="table-column">
      <style:table-column-properties style:column-width="1cm"/>
    </style:style>
    <style:style style:name="Table9.I" style:family="table-column">
      <style:table-column-properties style:column-width="7.761cm"/>
    </style:style>
    <style:style style:name="Table9.1" style:family="table-row">
      <style:table-row-properties style:min-row-height="0.7cm" fo:keep-together="auto"/>
    </style:style>
    <style:style style:name="Table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9.2" style:family="table-row">
      <style:table-row-properties style:min-row-height="0.644cm" fo:keep-together="auto"/>
    </style:style>
    <style:style style:name="Table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9.E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9.E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5" style:family="table-row">
      <style:table-row-properties style:min-row-height="7.999cm" fo:keep-together="auto"/>
    </style:style>
    <style:style style:name="Table9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9.6" style:family="table-row">
      <style:table-row-properties style:min-row-height="0.3cm" fo:keep-together="auto"/>
    </style:style>
    <style:style style:name="Table9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9.7" style:family="table-row">
      <style:table-row-properties style:min-row-height="0.466cm" fo:keep-together="auto"/>
    </style:style>
    <style:style style:name="Table9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8" style:family="table-row">
      <style:table-row-properties style:min-row-height="7.9cm" fo:keep-together="auto"/>
    </style:style>
    <style:style style:name="Table9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9.11" style:family="table-row">
      <style:table-row-properties style:min-row-height="5.001cm" fo:keep-together="auto"/>
    </style:style>
    <style:style style:name="Table9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9.12" style:family="table-row">
      <style:table-row-properties fo:keep-together="auto"/>
    </style:style>
    <style:style style:name="Table9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9.13" style:family="table-row">
      <style:table-row-properties fo:keep-together="auto"/>
    </style:style>
    <style:style style:name="Table9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14" style:family="table-row">
      <style:table-row-properties style:min-row-height="0.199cm" fo:keep-together="auto"/>
    </style:style>
    <style:style style:name="Table9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9.G14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9.15" style:family="table-row">
      <style:table-row-properties style:min-row-height="0.801cm" fo:keep-together="auto"/>
    </style:style>
    <style:style style:name="Table9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9.G15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9.C16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9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9.C1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9.D17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9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9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9.D18" style:family="table-cell">
      <style:table-cell-properties fo:padding-left="0.191cm" fo:padding-right="0.191cm" fo:padding-top="0.101cm" fo:padding-bottom="0cm" fo:border="none" style:writing-mode="lr-tb"/>
    </style:style>
    <style:style style:name="Table9.F18" style:family="table-cell">
      <style:table-cell-properties fo:padding-left="0.191cm" fo:padding-right="0.191cm" fo:padding-top="0.101cm" fo:padding-bottom="0cm" fo:border="none" style:writing-mode="lr-tb"/>
    </style:style>
    <style:style style:name="Table9.H18" style:family="table-cell">
      <style:table-cell-properties fo:padding-left="0.191cm" fo:padding-right="0.191cm" fo:padding-top="0.101cm" fo:padding-bottom="0cm" fo:border="none" style:writing-mode="lr-tb"/>
    </style:style>
    <style:style style:name="Table9.I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9.19" style:family="table-row">
      <style:table-row-properties style:min-row-height="0.4cm" fo:keep-together="auto"/>
    </style:style>
    <style:style style:name="Table9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9.20" style:family="table-row">
      <style:table-row-properties fo:keep-together="auto"/>
    </style:style>
    <style:style style:name="Table9.A2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22" style:family="table-row">
      <style:table-row-properties style:min-row-height="4.001cm" fo:keep-together="auto"/>
    </style:style>
    <style:style style:name="Table9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0" style:family="table">
      <style:table-properties style:width="17.254cm" fo:margin-left="-0.751cm" fo:margin-top="0cm" fo:margin-bottom="0cm" table:align="left" style:writing-mode="lr-tb"/>
    </style:style>
    <style:style style:name="Table10.A" style:family="table-column">
      <style:table-column-properties style:column-width="4.253cm"/>
    </style:style>
    <style:style style:name="Table10.B" style:family="table-column">
      <style:table-column-properties style:column-width="0.25cm"/>
    </style:style>
    <style:style style:name="Table10.C" style:family="table-column">
      <style:table-column-properties style:column-width="0.663cm"/>
    </style:style>
    <style:style style:name="Table10.D" style:family="table-column">
      <style:table-column-properties style:column-width="0.085cm"/>
    </style:style>
    <style:style style:name="Table10.E" style:family="table-column">
      <style:table-column-properties style:column-width="0.917cm"/>
    </style:style>
    <style:style style:name="Table10.F" style:family="table-column">
      <style:table-column-properties style:column-width="2.083cm"/>
    </style:style>
    <style:style style:name="Table10.H" style:family="table-column">
      <style:table-column-properties style:column-width="1cm"/>
    </style:style>
    <style:style style:name="Table10.I" style:family="table-column">
      <style:table-column-properties style:column-width="7.752cm"/>
    </style:style>
    <style:style style:name="Table10.1" style:family="table-row">
      <style:table-row-properties style:min-row-height="1.199cm" fo:keep-together="auto"/>
    </style:style>
    <style:style style:name="Table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0.2" style:family="table-row">
      <style:table-row-properties style:min-row-height="0.7cm" fo:keep-together="auto"/>
    </style:style>
    <style:style style:name="Table10.3" style:family="table-row">
      <style:table-row-properties style:min-row-height="0.644cm" fo:keep-together="auto"/>
    </style:style>
    <style:style style:name="Table10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0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0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0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6" style:family="table-row">
      <style:table-row-properties style:min-row-height="7.999cm" fo:keep-together="auto"/>
    </style:style>
    <style:style style:name="Table10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0.7" style:family="table-row">
      <style:table-row-properties style:min-row-height="0.3cm" fo:keep-together="auto"/>
    </style:style>
    <style:style style:name="Table10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0.8" style:family="table-row">
      <style:table-row-properties style:min-row-height="0.466cm" fo:keep-together="auto"/>
    </style:style>
    <style:style style:name="Table10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9" style:family="table-row">
      <style:table-row-properties style:min-row-height="7.9cm" fo:keep-together="auto"/>
    </style:style>
    <style:style style:name="Table10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0.12" style:family="table-row">
      <style:table-row-properties style:min-row-height="5.001cm" fo:keep-together="auto"/>
    </style:style>
    <style:style style:name="Table10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0.13" style:family="table-row">
      <style:table-row-properties fo:keep-together="auto"/>
    </style:style>
    <style:style style:name="Table10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0.14" style:family="table-row">
      <style:table-row-properties fo:keep-together="auto"/>
    </style:style>
    <style:style style:name="Table10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15" style:family="table-row">
      <style:table-row-properties style:min-row-height="0.199cm" fo:keep-together="auto"/>
    </style:style>
    <style:style style:name="Table10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0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0.16" style:family="table-row">
      <style:table-row-properties style:min-row-height="0.801cm" fo:keep-together="auto"/>
    </style:style>
    <style:style style:name="Table10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10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0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0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0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0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0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0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0.D19" style:family="table-cell">
      <style:table-cell-properties fo:padding-left="0.191cm" fo:padding-right="0.191cm" fo:padding-top="0.101cm" fo:padding-bottom="0cm" fo:border="none" style:writing-mode="lr-tb"/>
    </style:style>
    <style:style style:name="Table10.F19" style:family="table-cell">
      <style:table-cell-properties fo:padding-left="0.191cm" fo:padding-right="0.191cm" fo:padding-top="0.101cm" fo:padding-bottom="0cm" fo:border="none" style:writing-mode="lr-tb"/>
    </style:style>
    <style:style style:name="Table10.H19" style:family="table-cell">
      <style:table-cell-properties fo:padding-left="0.191cm" fo:padding-right="0.191cm" fo:padding-top="0.101cm" fo:padding-bottom="0cm" fo:border="none" style:writing-mode="lr-tb"/>
    </style:style>
    <style:style style:name="Table10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0.20" style:family="table-row">
      <style:table-row-properties style:min-row-height="0.4cm" fo:keep-together="auto"/>
    </style:style>
    <style:style style:name="Table10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23" style:family="table-row">
      <style:table-row-properties style:min-row-height="4.001cm" fo:keep-together="auto"/>
    </style:style>
    <style:style style:name="Table10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1" style:family="table">
      <style:table-properties style:width="17.254cm" fo:margin-left="-0.751cm" fo:margin-top="0cm" fo:margin-bottom="0cm" fo:break-before="page" table:align="left" style:writing-mode="lr-tb"/>
    </style:style>
    <style:style style:name="Table11.A" style:family="table-column">
      <style:table-column-properties style:column-width="4.253cm"/>
    </style:style>
    <style:style style:name="Table11.B" style:family="table-column">
      <style:table-column-properties style:column-width="0.25cm"/>
    </style:style>
    <style:style style:name="Table11.C" style:family="table-column">
      <style:table-column-properties style:column-width="0.663cm"/>
    </style:style>
    <style:style style:name="Table11.D" style:family="table-column">
      <style:table-column-properties style:column-width="0.085cm"/>
    </style:style>
    <style:style style:name="Table11.E" style:family="table-column">
      <style:table-column-properties style:column-width="0.917cm"/>
    </style:style>
    <style:style style:name="Table11.F" style:family="table-column">
      <style:table-column-properties style:column-width="2.083cm"/>
    </style:style>
    <style:style style:name="Table11.H" style:family="table-column">
      <style:table-column-properties style:column-width="1cm"/>
    </style:style>
    <style:style style:name="Table11.I" style:family="table-column">
      <style:table-column-properties style:column-width="7.752cm"/>
    </style:style>
    <style:style style:name="Table11.1" style:family="table-row">
      <style:table-row-properties style:min-row-height="1.199cm" fo:keep-together="auto"/>
    </style:style>
    <style:style style:name="Table11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1.2" style:family="table-row">
      <style:table-row-properties style:min-row-height="0.7cm" fo:keep-together="auto"/>
    </style:style>
    <style:style style:name="Table11.3" style:family="table-row">
      <style:table-row-properties style:min-row-height="0.644cm" fo:keep-together="auto"/>
    </style:style>
    <style:style style:name="Table11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1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1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1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1.6" style:family="table-row">
      <style:table-row-properties style:min-row-height="7.999cm" fo:keep-together="auto"/>
    </style:style>
    <style:style style:name="Table11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1.7" style:family="table-row">
      <style:table-row-properties style:min-row-height="0.3cm" fo:keep-together="auto"/>
    </style:style>
    <style:style style:name="Table11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1.8" style:family="table-row">
      <style:table-row-properties style:min-row-height="0.466cm" fo:keep-together="auto"/>
    </style:style>
    <style:style style:name="Table11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1.9" style:family="table-row">
      <style:table-row-properties style:min-row-height="7.9cm" fo:keep-together="auto"/>
    </style:style>
    <style:style style:name="Table11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1.12" style:family="table-row">
      <style:table-row-properties style:min-row-height="5.001cm" fo:keep-together="auto"/>
    </style:style>
    <style:style style:name="Table11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1.13" style:family="table-row">
      <style:table-row-properties fo:keep-together="auto"/>
    </style:style>
    <style:style style:name="Table11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1.14" style:family="table-row">
      <style:table-row-properties fo:keep-together="auto"/>
    </style:style>
    <style:style style:name="Table11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1.15" style:family="table-row">
      <style:table-row-properties style:min-row-height="0.199cm" fo:keep-together="auto"/>
    </style:style>
    <style:style style:name="Table11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1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1.16" style:family="table-row">
      <style:table-row-properties style:min-row-height="0.801cm" fo:keep-together="auto"/>
    </style:style>
    <style:style style:name="Table11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11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1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1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1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1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1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1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1.D19" style:family="table-cell">
      <style:table-cell-properties fo:padding-left="0.191cm" fo:padding-right="0.191cm" fo:padding-top="0.101cm" fo:padding-bottom="0cm" fo:border="none" style:writing-mode="lr-tb"/>
    </style:style>
    <style:style style:name="Table11.F19" style:family="table-cell">
      <style:table-cell-properties fo:padding-left="0.191cm" fo:padding-right="0.191cm" fo:padding-top="0.101cm" fo:padding-bottom="0cm" fo:border="none" style:writing-mode="lr-tb"/>
    </style:style>
    <style:style style:name="Table11.H19" style:family="table-cell">
      <style:table-cell-properties fo:padding-left="0.191cm" fo:padding-right="0.191cm" fo:padding-top="0.101cm" fo:padding-bottom="0cm" fo:border="none" style:writing-mode="lr-tb"/>
    </style:style>
    <style:style style:name="Table11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1.20" style:family="table-row">
      <style:table-row-properties style:min-row-height="0.4cm" fo:keep-together="auto"/>
    </style:style>
    <style:style style:name="Table11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1.21" style:family="table-row">
      <style:table-row-properties fo:keep-together="auto"/>
    </style:style>
    <style:style style:name="Table11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1.22" style:family="table-row">
      <style:table-row-properties fo:keep-together="auto"/>
    </style:style>
    <style:style style:name="Table11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1.23" style:family="table-row">
      <style:table-row-properties style:min-row-height="4.001cm" fo:keep-together="auto"/>
    </style:style>
    <style:style style:name="Table11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2" style:family="table">
      <style:table-properties style:width="17.254cm" fo:margin-left="-0.751cm" fo:margin-top="0cm" fo:margin-bottom="0cm" table:align="left" style:writing-mode="lr-tb"/>
    </style:style>
    <style:style style:name="Table12.A" style:family="table-column">
      <style:table-column-properties style:column-width="4.253cm"/>
    </style:style>
    <style:style style:name="Table12.B" style:family="table-column">
      <style:table-column-properties style:column-width="0.25cm"/>
    </style:style>
    <style:style style:name="Table12.C" style:family="table-column">
      <style:table-column-properties style:column-width="0.663cm"/>
    </style:style>
    <style:style style:name="Table12.D" style:family="table-column">
      <style:table-column-properties style:column-width="0.085cm"/>
    </style:style>
    <style:style style:name="Table12.E" style:family="table-column">
      <style:table-column-properties style:column-width="0.917cm"/>
    </style:style>
    <style:style style:name="Table12.F" style:family="table-column">
      <style:table-column-properties style:column-width="2.083cm"/>
    </style:style>
    <style:style style:name="Table12.H" style:family="table-column">
      <style:table-column-properties style:column-width="1cm"/>
    </style:style>
    <style:style style:name="Table12.I" style:family="table-column">
      <style:table-column-properties style:column-width="7.752cm"/>
    </style:style>
    <style:style style:name="Table12.1" style:family="table-row">
      <style:table-row-properties style:min-row-height="1.199cm" fo:keep-together="auto"/>
    </style:style>
    <style:style style:name="Table1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2.2" style:family="table-row">
      <style:table-row-properties style:min-row-height="0.7cm" fo:keep-together="auto"/>
    </style:style>
    <style:style style:name="Table12.3" style:family="table-row">
      <style:table-row-properties style:min-row-height="0.644cm" fo:keep-together="auto"/>
    </style:style>
    <style:style style:name="Table12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2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2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2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6" style:family="table-row">
      <style:table-row-properties style:min-row-height="7.999cm" fo:keep-together="auto"/>
    </style:style>
    <style:style style:name="Table12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2.7" style:family="table-row">
      <style:table-row-properties style:min-row-height="0.3cm" fo:keep-together="auto"/>
    </style:style>
    <style:style style:name="Table12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8" style:family="table-row">
      <style:table-row-properties style:min-row-height="0.466cm" fo:keep-together="auto"/>
    </style:style>
    <style:style style:name="Table12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9" style:family="table-row">
      <style:table-row-properties style:min-row-height="7.9cm" fo:keep-together="auto"/>
    </style:style>
    <style:style style:name="Table12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2.12" style:family="table-row">
      <style:table-row-properties style:min-row-height="5.001cm" fo:keep-together="auto"/>
    </style:style>
    <style:style style:name="Table12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2.13" style:family="table-row">
      <style:table-row-properties fo:keep-together="auto"/>
    </style:style>
    <style:style style:name="Table12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14" style:family="table-row">
      <style:table-row-properties fo:keep-together="auto"/>
    </style:style>
    <style:style style:name="Table12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15" style:family="table-row">
      <style:table-row-properties style:min-row-height="0.199cm" fo:keep-together="auto"/>
    </style:style>
    <style:style style:name="Table12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2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2.16" style:family="table-row">
      <style:table-row-properties style:min-row-height="0.801cm" fo:keep-together="auto"/>
    </style:style>
    <style:style style:name="Table12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12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2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2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2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2.D19" style:family="table-cell">
      <style:table-cell-properties fo:padding-left="0.191cm" fo:padding-right="0.191cm" fo:padding-top="0.101cm" fo:padding-bottom="0cm" fo:border="none" style:writing-mode="lr-tb"/>
    </style:style>
    <style:style style:name="Table12.F19" style:family="table-cell">
      <style:table-cell-properties fo:padding-left="0.191cm" fo:padding-right="0.191cm" fo:padding-top="0.101cm" fo:padding-bottom="0cm" fo:border="none" style:writing-mode="lr-tb"/>
    </style:style>
    <style:style style:name="Table12.H19" style:family="table-cell">
      <style:table-cell-properties fo:padding-left="0.191cm" fo:padding-right="0.191cm" fo:padding-top="0.101cm" fo:padding-bottom="0cm" fo:border="none" style:writing-mode="lr-tb"/>
    </style:style>
    <style:style style:name="Table12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2.20" style:family="table-row">
      <style:table-row-properties style:min-row-height="0.4cm" fo:keep-together="auto"/>
    </style:style>
    <style:style style:name="Table12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2.21" style:family="table-row">
      <style:table-row-properties fo:keep-together="auto"/>
    </style:style>
    <style:style style:name="Table12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22" style:family="table-row">
      <style:table-row-properties fo:keep-together="auto"/>
    </style:style>
    <style:style style:name="Table12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23" style:family="table-row">
      <style:table-row-properties style:min-row-height="4.001cm" fo:keep-together="auto"/>
    </style:style>
    <style:style style:name="Table12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2.A26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2.E26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2.A27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2.E27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2.28" style:family="table-row">
      <style:table-row-properties fo:keep-together="auto"/>
    </style:style>
    <style:style style:name="Table12.A2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A29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2.A3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A3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A32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2.33" style:family="table-row">
      <style:table-row-properties fo:keep-together="auto"/>
    </style:style>
    <style:style style:name="Table12.A3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34" style:family="table-row">
      <style:table-row-properties fo:keep-together="auto"/>
    </style:style>
    <style:style style:name="Table12.A34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2.A35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2.36" style:family="table-row">
      <style:table-row-properties fo:keep-together="auto"/>
    </style:style>
    <style:style style:name="Table12.A3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37" style:family="table-row">
      <style:table-row-properties fo:keep-together="auto"/>
    </style:style>
    <style:style style:name="Table12.A3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A38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2.G38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2.40" style:family="table-row">
      <style:table-row-properties fo:keep-together="auto"/>
    </style:style>
    <style:style style:name="Table12.A40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40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2.A41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4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2.D41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2.A42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2.C42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2.D42" style:family="table-cell">
      <style:table-cell-properties fo:padding-left="0.191cm" fo:padding-right="0.191cm" fo:padding-top="0.101cm" fo:padding-bottom="0cm" fo:border="none" style:writing-mode="lr-tb"/>
    </style:style>
    <style:style style:name="Table12.F42" style:family="table-cell">
      <style:table-cell-properties fo:padding-left="0.191cm" fo:padding-right="0.191cm" fo:padding-top="0.101cm" fo:padding-bottom="0cm" fo:border="none" style:writing-mode="lr-tb"/>
    </style:style>
    <style:style style:name="Table12.H42" style:family="table-cell">
      <style:table-cell-properties fo:padding-left="0.191cm" fo:padding-right="0.191cm" fo:padding-top="0.101cm" fo:padding-bottom="0cm" fo:border="none" style:writing-mode="lr-tb"/>
    </style:style>
    <style:style style:name="Table12.I42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2.A43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2.44" style:family="table-row">
      <style:table-row-properties fo:keep-together="auto"/>
    </style:style>
    <style:style style:name="Table12.A44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2.45" style:family="table-row">
      <style:table-row-properties fo:keep-together="auto"/>
    </style:style>
    <style:style style:name="Table12.A4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2.A4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3" style:family="table">
      <style:table-properties style:width="17.254cm" fo:margin-left="-0.751cm" fo:margin-top="0cm" fo:margin-bottom="0cm" table:align="left" style:writing-mode="lr-tb"/>
    </style:style>
    <style:style style:name="Table13.A" style:family="table-column">
      <style:table-column-properties style:column-width="4.253cm"/>
    </style:style>
    <style:style style:name="Table13.B" style:family="table-column">
      <style:table-column-properties style:column-width="0.25cm"/>
    </style:style>
    <style:style style:name="Table13.C" style:family="table-column">
      <style:table-column-properties style:column-width="0.663cm"/>
    </style:style>
    <style:style style:name="Table13.D" style:family="table-column">
      <style:table-column-properties style:column-width="0.085cm"/>
    </style:style>
    <style:style style:name="Table13.E" style:family="table-column">
      <style:table-column-properties style:column-width="0.917cm"/>
    </style:style>
    <style:style style:name="Table13.F" style:family="table-column">
      <style:table-column-properties style:column-width="2.083cm"/>
    </style:style>
    <style:style style:name="Table13.H" style:family="table-column">
      <style:table-column-properties style:column-width="1cm"/>
    </style:style>
    <style:style style:name="Table13.I" style:family="table-column">
      <style:table-column-properties style:column-width="7.752cm"/>
    </style:style>
    <style:style style:name="Table13.1" style:family="table-row">
      <style:table-row-properties style:min-row-height="1.199cm" fo:keep-together="auto"/>
    </style:style>
    <style:style style:name="Table13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3.2" style:family="table-row">
      <style:table-row-properties style:min-row-height="0.7cm" fo:keep-together="auto"/>
    </style:style>
    <style:style style:name="Table13.3" style:family="table-row">
      <style:table-row-properties style:min-row-height="0.644cm" fo:keep-together="auto"/>
    </style:style>
    <style:style style:name="Table13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3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3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3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3.6" style:family="table-row">
      <style:table-row-properties style:min-row-height="7.999cm" fo:keep-together="auto"/>
    </style:style>
    <style:style style:name="Table13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3.7" style:family="table-row">
      <style:table-row-properties style:min-row-height="0.3cm" fo:keep-together="auto"/>
    </style:style>
    <style:style style:name="Table13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3.8" style:family="table-row">
      <style:table-row-properties style:min-row-height="0.466cm" fo:keep-together="auto"/>
    </style:style>
    <style:style style:name="Table13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3.9" style:family="table-row">
      <style:table-row-properties style:min-row-height="7.9cm" fo:keep-together="auto"/>
    </style:style>
    <style:style style:name="Table13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3.12" style:family="table-row">
      <style:table-row-properties style:min-row-height="5.001cm" fo:keep-together="auto"/>
    </style:style>
    <style:style style:name="Table13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3.13" style:family="table-row">
      <style:table-row-properties fo:keep-together="auto"/>
    </style:style>
    <style:style style:name="Table13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3.14" style:family="table-row">
      <style:table-row-properties fo:keep-together="auto"/>
    </style:style>
    <style:style style:name="Table13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3.15" style:family="table-row">
      <style:table-row-properties style:min-row-height="0.199cm" fo:keep-together="auto"/>
    </style:style>
    <style:style style:name="Table13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3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3.16" style:family="table-row">
      <style:table-row-properties style:min-row-height="0.801cm" fo:keep-together="auto"/>
    </style:style>
    <style:style style:name="Table13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13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13.17" style:family="table-row">
      <style:table-row-properties fo:keep-together="auto"/>
    </style:style>
    <style:style style:name="Table13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3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3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3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3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3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3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3.D19" style:family="table-cell">
      <style:table-cell-properties fo:padding-left="0.191cm" fo:padding-right="0.191cm" fo:padding-top="0.101cm" fo:padding-bottom="0cm" fo:border="none" style:writing-mode="lr-tb"/>
    </style:style>
    <style:style style:name="Table13.F19" style:family="table-cell">
      <style:table-cell-properties fo:padding-left="0.191cm" fo:padding-right="0.191cm" fo:padding-top="0.101cm" fo:padding-bottom="0cm" fo:border="none" style:writing-mode="lr-tb"/>
    </style:style>
    <style:style style:name="Table13.H19" style:family="table-cell">
      <style:table-cell-properties fo:padding-left="0.191cm" fo:padding-right="0.191cm" fo:padding-top="0.101cm" fo:padding-bottom="0cm" fo:border="none" style:writing-mode="lr-tb"/>
    </style:style>
    <style:style style:name="Table13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3.20" style:family="table-row">
      <style:table-row-properties style:min-row-height="0.4cm" fo:keep-together="auto"/>
    </style:style>
    <style:style style:name="Table13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3.21" style:family="table-row">
      <style:table-row-properties fo:keep-together="auto"/>
    </style:style>
    <style:style style:name="Table13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3.22" style:family="table-row">
      <style:table-row-properties fo:keep-together="auto"/>
    </style:style>
    <style:style style:name="Table13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3.23" style:family="table-row">
      <style:table-row-properties style:min-row-height="4.001cm" fo:keep-together="auto"/>
    </style:style>
    <style:style style:name="Table13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4" style:family="table">
      <style:table-properties style:width="17.254cm" fo:margin-left="-0.751cm" fo:margin-top="0cm" fo:margin-bottom="0cm" fo:break-before="page" table:align="left" style:writing-mode="lr-tb"/>
    </style:style>
    <style:style style:name="Table14.A" style:family="table-column">
      <style:table-column-properties style:column-width="4.253cm"/>
    </style:style>
    <style:style style:name="Table14.B" style:family="table-column">
      <style:table-column-properties style:column-width="0.25cm"/>
    </style:style>
    <style:style style:name="Table14.C" style:family="table-column">
      <style:table-column-properties style:column-width="0.663cm"/>
    </style:style>
    <style:style style:name="Table14.D" style:family="table-column">
      <style:table-column-properties style:column-width="0.085cm"/>
    </style:style>
    <style:style style:name="Table14.E" style:family="table-column">
      <style:table-column-properties style:column-width="0.917cm"/>
    </style:style>
    <style:style style:name="Table14.F" style:family="table-column">
      <style:table-column-properties style:column-width="2.083cm"/>
    </style:style>
    <style:style style:name="Table14.H" style:family="table-column">
      <style:table-column-properties style:column-width="1cm"/>
    </style:style>
    <style:style style:name="Table14.I" style:family="table-column">
      <style:table-column-properties style:column-width="7.752cm"/>
    </style:style>
    <style:style style:name="Table14.1" style:family="table-row">
      <style:table-row-properties style:min-row-height="1.199cm" fo:keep-together="auto"/>
    </style:style>
    <style:style style:name="Table14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4.2" style:family="table-row">
      <style:table-row-properties style:min-row-height="0.7cm" fo:keep-together="auto"/>
    </style:style>
    <style:style style:name="Table14.3" style:family="table-row">
      <style:table-row-properties style:min-row-height="0.644cm" fo:keep-together="auto"/>
    </style:style>
    <style:style style:name="Table14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4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4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4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4.6" style:family="table-row">
      <style:table-row-properties style:min-row-height="7.999cm" fo:keep-together="auto"/>
    </style:style>
    <style:style style:name="Table14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4.7" style:family="table-row">
      <style:table-row-properties style:min-row-height="0.3cm" fo:keep-together="auto"/>
    </style:style>
    <style:style style:name="Table14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4.8" style:family="table-row">
      <style:table-row-properties style:min-row-height="0.466cm" fo:keep-together="auto"/>
    </style:style>
    <style:style style:name="Table14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4.9" style:family="table-row">
      <style:table-row-properties style:min-row-height="7.9cm" fo:keep-together="auto"/>
    </style:style>
    <style:style style:name="Table14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14.12" style:family="table-row">
      <style:table-row-properties style:min-row-height="5.001cm" fo:keep-together="auto"/>
    </style:style>
    <style:style style:name="Table14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14.13" style:family="table-row">
      <style:table-row-properties fo:keep-together="auto"/>
    </style:style>
    <style:style style:name="Table14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4.14" style:family="table-row">
      <style:table-row-properties fo:keep-together="auto"/>
    </style:style>
    <style:style style:name="Table14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4.15" style:family="table-row">
      <style:table-row-properties style:min-row-height="0.199cm" fo:keep-together="auto"/>
    </style:style>
    <style:style style:name="Table14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14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14.16" style:family="table-row">
      <style:table-row-properties style:min-row-height="0.801cm" fo:keep-together="auto"/>
    </style:style>
    <style:style style:name="Table14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14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14.17" style:family="table-row">
      <style:table-row-properties fo:keep-together="auto"/>
    </style:style>
    <style:style style:name="Table14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4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14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4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4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4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14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14.D19" style:family="table-cell">
      <style:table-cell-properties fo:padding-left="0.191cm" fo:padding-right="0.191cm" fo:padding-top="0.101cm" fo:padding-bottom="0cm" fo:border="none" style:writing-mode="lr-tb"/>
    </style:style>
    <style:style style:name="Table14.F19" style:family="table-cell">
      <style:table-cell-properties fo:padding-left="0.191cm" fo:padding-right="0.191cm" fo:padding-top="0.101cm" fo:padding-bottom="0cm" fo:border="none" style:writing-mode="lr-tb"/>
    </style:style>
    <style:style style:name="Table14.H19" style:family="table-cell">
      <style:table-cell-properties fo:padding-left="0.191cm" fo:padding-right="0.191cm" fo:padding-top="0.101cm" fo:padding-bottom="0cm" fo:border="none" style:writing-mode="lr-tb"/>
    </style:style>
    <style:style style:name="Table14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14.20" style:family="table-row">
      <style:table-row-properties style:min-row-height="0.4cm" fo:keep-together="auto"/>
    </style:style>
    <style:style style:name="Table14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14.21" style:family="table-row">
      <style:table-row-properties fo:keep-together="auto"/>
    </style:style>
    <style:style style:name="Table14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14.22" style:family="table-row">
      <style:table-row-properties fo:keep-together="auto"/>
    </style:style>
    <style:style style:name="Table14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4.23" style:family="table-row">
      <style:table-row-properties style:min-row-height="4.001cm" fo:keep-together="auto"/>
    </style:style>
    <style:style style:name="Table14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15" style:family="table">
      <style:table-properties style:width="17.254cm" fo:margin-left="-0.751cm" fo:margin-top="0cm" fo:margin-bottom="0cm" fo:break-before="page" table:align="left" style:writing-mode="lr-tb"/>
    </style:style>
    <style:style style:name="Table15.A" style:family="table-column">
      <style:table-column-properties style:column-width="4.002cm"/>
    </style:style>
    <style:style style:name="Table15.B" style:family="table-column">
      <style:table-column-properties style:column-width="8.502cm"/>
    </style:style>
    <style:style style:name="Table15.C" style:family="table-column">
      <style:table-column-properties style:column-width="4.75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5.2" style:family="table-row">
      <style:table-row-properties style:min-row-height="0.035cm" fo:keep-together="auto"/>
    </style:style>
    <style:style style:name="Table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5.3" style:family="table-row">
      <style:table-row-properties style:min-row-height="1.401cm" fo:keep-together="auto"/>
    </style:style>
    <style:style style:name="Table1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15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15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15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15.5" style:family="table-row">
      <style:table-row-properties style:min-row-height="0.9cm" fo:keep-together="auto"/>
    </style:style>
    <style:style style:name="Table15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15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15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15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5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5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5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15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15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16" style:family="table">
      <style:table-properties style:width="17.254cm" fo:margin-left="-0.751cm" fo:margin-top="0cm" fo:margin-bottom="0cm" table:align="left" style:writing-mode="lr-tb"/>
    </style:style>
    <style:style style:name="Table16.A" style:family="table-column">
      <style:table-column-properties style:column-width="17.254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6.2" style:family="table-row">
      <style:table-row-properties style:min-row-height="0.035cm" fo:keep-together="auto"/>
    </style:style>
    <style:style style:name="Table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6.3" style:family="table-row">
      <style:table-row-properties style:min-row-height="1cm" fo:keep-together="auto"/>
    </style:style>
    <style:style style:name="Table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17" style:family="table">
      <style:table-properties style:width="17.254cm" fo:margin-left="-0.751cm" fo:margin-top="0cm" fo:margin-bottom="0cm" table:align="left" style:writing-mode="lr-tb"/>
    </style:style>
    <style:style style:name="Table17.A" style:family="table-column">
      <style:table-column-properties style:column-width="17.254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7.2" style:family="table-row">
      <style:table-row-properties style:min-row-height="0.035cm" fo:keep-together="auto"/>
    </style:style>
    <style:style style:name="Table17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7.3" style:family="table-row">
      <style:table-row-properties style:min-row-height="1.401cm" fo:keep-together="auto"/>
    </style:style>
    <style:style style:name="Table17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17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17.5" style:family="table-row">
      <style:table-row-properties style:min-row-height="1.199cm" fo:keep-together="auto"/>
    </style:style>
    <style:style style:name="Table17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17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19" style:family="table">
      <style:table-properties style:width="17.254cm" fo:margin-left="-0.751cm" fo:margin-top="0cm" fo:margin-bottom="0cm" table:align="left" style:writing-mode="lr-tb"/>
    </style:style>
    <style:style style:name="Table19.A" style:family="table-column">
      <style:table-column-properties style:column-width="17.254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9.2" style:family="table-row">
      <style:table-row-properties style:min-row-height="0.035cm" fo:keep-together="auto"/>
    </style:style>
    <style:style style:name="Table19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9.3" style:family="table-row">
      <style:table-row-properties style:min-row-height="1.401cm" fo:keep-together="auto"/>
    </style:style>
    <style:style style:name="Table19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19.A4" style:family="table-cell">
      <style:table-cell-properties fo:padding-left="0.191cm" fo:padding-right="0.191cm" fo:padding-top="0.101cm" fo:padding-bottom="0cm" fo:border="none" style:writing-mode="lr-tb"/>
    </style:style>
    <style:style style:name="P1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left="-0.074cm"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left="-0.074cm" fo:margin-top="0cm" fo:margin-bottom="0cm" style:contextual-spacing="false" fo:line-height="100%" fo:text-align="left" style:justify-single-word="false" fo:orphans="2" fo:widows="2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light1" loext:color-type="theme"/>
      </style:text-properties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pt" style:language-complex="ar" style:country-complex="SA">
        <loext:char-complex-color loext:theme-type="light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margin-top="0cm" fo:margin-bottom="0cm" style:contextual-spacing="false" fo:line-height="100%" fo:text-align="righ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Standard" style:master-page-name="Converted1">
      <style:paragraph-properties style:page-number="auto"/>
      <style:text-properties fo:color="#ffffff" loext:opacity="100%">
        <loext:char-complex-color loext:theme-type="light1" loext:color-type="theme"/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8pt" fo:language="fr" fo:country="FR" fo:font-weight="bold" style:letter-kerning="false" style:font-name-asian="Calibri1" style:font-size-asian="8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Standard">
      <style:paragraph-properties fo:margin-top="0cm" fo:margin-bottom="0.212cm" style:contextual-spacing="false" fo:line-height="100%" fo:text-align="lef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Standard">
      <style:paragraph-properties fo:margin-top="0cm" fo:margin-bottom="0.212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.212cm" style:contextual-spacing="false" fo:line-height="100%" fo:text-align="lef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Standard">
      <style:paragraph-properties fo:margin-top="0cm" fo:margin-bottom="0.212cm" style:contextual-spacing="false" fo:line-height="100%" fo:text-align="lef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0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List_20_Paragraph" style:list-style-name="WWNum7">
      <style:paragraph-properties fo:margin-left="1.27cm" fo:margin-right="0.309cm" fo:margin-top="0cm" fo:margin-bottom="0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2" style:family="paragraph" style:parent-style-name="List_20_Paragraph" style:list-style-name="WWNum7">
      <style:paragraph-properties fo:margin-left="1.27cm" fo:margin-right="0.309cm" fo:margin-top="0cm" fo:margin-bottom="0cm" style:contextual-spacing="true" fo:line-height="100%" fo:text-align="justify" style:justify-single-word="false" fo:orphans="0" fo:widows="0" fo:text-indent="-0.635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Standard">
      <style:paragraph-properties fo:margin-right="0.309cm" fo:margin-top="0cm" fo:margin-bottom="0cm" style:contextual-spacing="false" fo:line-height="100%" fo:text-align="righ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right="0.309cm" fo:margin-top="0cm" fo:margin-bottom="0cm" style:contextual-spacing="false" fo:line-height="100%" fo:text-align="right" style:justify-single-word="false" fo:orphans="2" fo:widows="2">
        <style:tab-stops>
          <style:tab-stop style:position="1.499cm"/>
        </style:tab-stops>
      </style:paragraph-properties>
      <style:text-properties fo:color="#7f7f7f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P2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7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8" style:family="paragraph" style:parent-style-name="Standard">
      <style:paragraph-properties fo:margin-right="0.309cm" fo:margin-top="0cm" fo:margin-bottom="0.212cm" style:contextual-spacing="false" fo:line-height="100%" fo:text-align="righ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line-height="100%" fo:text-align="righ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right="0.309cm" fo:margin-top="0cm" fo:margin-bottom="0.212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 style:master-page-name="Converted2">
      <style:paragraph-properties fo:margin-top="0cm" fo:margin-bottom="0.212cm" style:contextual-spacing="false" fo:text-align="justify" style:justify-single-word="false" style:page-number="auto"/>
      <style:text-properties fo:color="#404040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3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5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-complex="Calibri1"/>
    </style:style>
    <style:style style:name="P36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1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2" style:family="paragraph" style:parent-style-name="Standard">
      <style:paragraph-properties fo:margin-top="0cm" fo:margin-bottom="0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4" style:family="paragraph" style:parent-style-name="Standard">
      <style:paragraph-properties fo:margin-top="0cm" fo:margin-bottom="0.212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.212cm" style:contextual-spacing="false" fo:line-height="100%" fo:text-align="lef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6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47" style:family="paragraph" style:parent-style-name="Standard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48" style:family="paragraph" style:parent-style-name="Standard" style:master-page-name="Converted3">
      <style:paragraph-properties style:page-number="auto" fo:break-before="page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P51" style:family="paragraph" style:parent-style-name="Standard">
      <style:paragraph-properties fo:margin-top="0cm" fo:margin-bottom="0cm" style:contextual-spacing="false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52" style:family="paragraph" style:parent-style-name="Standard">
      <style:paragraph-properties fo:margin-right="0.06cm" fo:margin-top="0cm" fo:margin-bottom="0cm" style:contextual-spacing="false" fo:line-height="100%" fo:text-align="righ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53" style:family="paragraph" style:parent-style-name="Standard">
      <style:paragraph-properties fo:margin-right="0.06cm" fo:margin-top="0cm" fo:margin-bottom="0cm" style:contextual-spacing="false" fo:line-height="100%" fo:text-align="right" style:justify-single-word="false" fo:orphans="2" fo:widows="2"/>
      <style:text-properties fo:color="#d60093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54" style:family="paragraph" style:parent-style-name="Standard">
      <style:paragraph-properties fo:margin-right="0.06cm" fo:margin-top="0cm" fo:margin-bottom="0cm" style:contextual-spacing="false" fo:line-height="100%" fo:text-align="left" style:justify-single-word="false" fo:orphans="2" fo:widows="2"/>
      <style:text-properties fo:color="#d60093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55" style:family="paragraph" style:parent-style-name="Standard">
      <style:paragraph-properties fo:margin-right="0.06cm" fo:margin-top="0cm" fo:margin-bottom="0cm" style:contextual-spacing="false" fo:line-height="100%" fo:text-align="righ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right="0.06cm"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right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59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35398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3bfa7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5b507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2749a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5b3c2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4073d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officeooo:paragraph-rsid="005fd482"/>
    </style:style>
    <style:style style:name="P66" style:family="paragraph" style:parent-style-name="Preformatted_20_Text">
      <style:text-properties officeooo:paragraph-rsid="006a5076"/>
    </style:style>
    <style:style style:name="P67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officeooo:paragraph-rsid="00625efb"/>
    </style:style>
    <style:style style:name="P68" style:family="paragraph" style:parent-style-name="Standard">
      <style:text-properties officeooo:paragraph-rsid="007e1adb"/>
    </style:style>
    <style:style style:name="P69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4f613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officeooo:paragraph-rsid="004f613d"/>
    </style:style>
    <style:style style:name="P71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7c80a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2" style:family="paragraph" style:parent-style-name="Code_20_Block">
      <style:text-properties officeooo:paragraph-rsid="0072ce15"/>
    </style:style>
    <style:style style:name="P73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2355e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8pt" fo:language="fr" fo:country="FR" fo:font-weight="bold" officeooo:rsid="005decf7" officeooo:paragraph-rsid="005decf7" style:letter-kerning="false" style:font-name-asian="Calibri1" style:font-size-asian="8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6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745cf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officeooo:paragraph-rsid="007588b3"/>
    </style:style>
    <style:style style:name="P78" style:family="paragraph" style:parent-style-name="Standard">
      <style:text-properties officeooo:paragraph-rsid="007731fa"/>
    </style:style>
    <style:style style:name="P79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7588b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1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d60093" loext:opacity="100%" style:font-name="Calibri" fo:font-size="1pt" fo:language="fr" fo:country="FR" fo:font-style="italic" fo:font-weight="bold" style:letter-kerning="false" style:font-name-asian="Calibri1" style:font-size-asian="1pt" style:language-asian="en" style:country-asian="US" style:font-style-asian="italic" style:font-weight-asian="bold" style:font-name-complex="Calibri1" style:font-size-complex="1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4pt" fo:language="fr" fo:country="FR" fo:font-weight="bold" style:letter-kerning="false" style:font-name-asian="Calibri1" style:font-size-asian="4pt" style:language-asian="en" style:country-asian="US" style:font-weight-asian="bold" style:font-name-complex="Calibri1" style:font-size-complex="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3" style:family="paragraph" style:parent-style-name="Standard">
      <style:paragraph-properties fo:margin-top="0.141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47ae1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.353cm" style:contextual-spacing="false" fo:break-before="page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86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79af3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text-properties officeooo:paragraph-rsid="007c80a3"/>
    </style:style>
    <style:style style:name="P88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7a66d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0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1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officeooo:paragraph-rsid="007f2710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2" style:family="paragraph" style:parent-style-name="Standard">
      <style:paragraph-properties fo:margin-top="0.212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paragraph-rsid="0016a92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1" style:font-size-asian="14pt" style:language-asian="fr" style:country-asian="FR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5" style:family="paragraph" style:parent-style-name="Standard">
      <style:paragraph-properties fo:margin-right="0.309cm" fo:margin-top="0cm" fo:margin-bottom="0cm" style:contextual-spacing="false" fo:line-height="100%" fo:text-align="lef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6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/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00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01" style:family="paragraph">
      <style:paragraph-properties fo:text-align="left"/>
      <style:text-properties fo:font-size="18pt"/>
    </style:style>
    <style:style style:name="P102" style:family="paragraph">
      <loext:graphic-properties draw:fill="none"/>
      <style:paragraph-properties fo:text-align="left" style:writing-mode="lr-tb"/>
      <style:text-properties fo:font-size="18pt"/>
    </style:style>
    <style:style style:name="P103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04" style:family="paragraph" style:parent-style-name="Standard">
      <style:paragraph-properties fo:margin-top="0cm" fo:margin-bottom="0cm" style:contextual-spacing="false" fo:line-height="200%"/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P105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06" style:family="paragraph">
      <loext:graphic-properties draw:fill="none"/>
      <style:paragraph-properties fo:text-align="left"/>
      <style:text-properties fo:font-size="18pt"/>
    </style:style>
    <style:style style:name="P107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08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P109" style:family="paragraph" style:parent-style-name="Standard">
      <style:paragraph-properties fo:line-height="150%"/>
    </style:style>
    <style:style style:name="P110" style:family="paragraph" style:parent-style-name="Standard">
      <style:paragraph-properties fo:margin-right="0.309cm" fo:margin-top="0cm" fo:margin-bottom="0cm" style:contextual-spacing="false" fo:line-height="100%" fo:text-align="left" style:justify-single-word="false" fo:orphans="2" fo:widows="2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1" style:family="paragraph" style:parent-style-name="Standard" style:master-page-name="Converted4">
      <style:paragraph-properties fo:margin-top="0cm" fo:margin-bottom="0cm" style:contextual-spacing="false" style:page-number="auto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3" style:family="paragraph" style:parent-style-name="Standard" style:master-page-name="Converted5">
      <style:paragraph-properties style:page-number="auto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4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/>
    </style:style>
    <style:style style:name="P115" style:family="paragraph" style:parent-style-name="Frame_20_contents">
      <style:paragraph-properties fo:margin-right="-0.101cm" fo:margin-top="0cm" fo:margin-bottom="0cm" style:contextual-spacing="false" fo:line-height="120%" fo:text-align="right" style:justify-single-word="false"/>
    </style:style>
    <style:style style:name="T1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3" style:family="text">
      <style:text-properties fo:color="#404040" loext:opacity="100%" style:language-asian="fr" style:country-asian="FR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5" style:family="text">
      <style:text-properties fo:color="#d60093" loext:opacity="100%" fo:font-size="12pt" fo:font-style="italic" style:font-size-asian="12pt" style:language-asian="fr" style:country-asian="FR" style:font-style-asian="italic" style:font-name-complex="Calibri1" style:font-size-complex="12pt"/>
    </style:style>
    <style:style style:name="T6" style:family="text">
      <style:text-properties fo:color="#d60093" loext:opacity="100%" style:font-name="Wingdings 3" fo:font-size="6pt" style:font-size-asian="6pt" style:language-asian="fr" style:country-asian="FR" style:font-name-complex="Calibri1" style:font-size-complex="6pt"/>
    </style:style>
    <style:style style:name="T7" style:family="text">
      <style:text-properties officeooo:rsid="000faab7"/>
    </style:style>
    <style:style style:name="T8" style:family="text">
      <style:text-properties fo:color="#404040" loext:opacity="100%" fo:font-size="6pt" style:font-size-asian="6pt" style:language-asian="fr" style:country-asian="FR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Wingdings 3" fo:font-size="6pt" style:font-size-asian="6pt" style:language-asian="fr" style:country-asian="FR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ffffff" loext:opacity="100%" fo:font-size="20pt" fo:font-weight="bold" style:font-size-asian="20pt" style:font-weight-asian="bold" style:font-name-complex="Calibri1" style:font-size-complex="20pt">
        <loext:char-complex-color loext:theme-type="light1" loext:color-type="theme"/>
      </style:text-properties>
    </style:style>
    <style:style style:name="T11" style:family="text">
      <style:text-properties fo:font-size="20pt" fo:font-weight="bold" style:font-size-asian="20pt" style:font-weight-asian="bold" style:font-name-complex="Calibri1" style:font-size-complex="20pt"/>
    </style:style>
    <style:style style:name="T12" style:family="text">
      <style:text-properties fo:color="#ffffff" loext:opacity="100%" fo:font-size="1pt" fo:font-weight="bold" style:font-size-asian="1pt" style:font-weight-asian="bold" style:font-name-complex="Calibri1" style:font-size-complex="1pt">
        <loext:char-complex-color loext:theme-type="light1" loext:color-type="theme"/>
      </style:text-properties>
    </style:style>
    <style:style style:name="T13" style:family="text">
      <style:text-properties fo:color="#404040" loext:opacity="100%" fo:font-size="16pt" fo:font-weight="bold" style:font-size-asian="16pt" style:font-weight-asian="bold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fo:font-size="16pt" fo:font-weight="bold" officeooo:rsid="000faab7" style:font-size-asian="16pt" style:font-weight-asian="bold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font-variant="small-caps" fo:font-size="18pt" fo:font-weight="bold" style:font-size-asian="18pt" style:font-weight-asian="bold" style:font-name-complex="Calibri1" style:font-size-complex="18pt"/>
    </style:style>
    <style:style style:name="T17" style:family="text">
      <style:text-properties fo:font-family="'MS Gothic'" style:font-family-generic="roman" style:font-pitch="variable" style:font-family-asian="'MS Gothic'" style:font-family-generic-asian="system" style:font-pitch-asian="variable" style:language-asian="fr" style:country-asian="FR" style:font-name-complex="Calibri1"/>
    </style:style>
    <style:style style:name="T18" style:family="text">
      <style:text-properties fo:font-size="16pt" style:font-size-asian="16pt" style:font-name-complex="Calibri1" style:font-size-complex="16pt"/>
    </style:style>
    <style:style style:name="T19" style:family="text">
      <style:text-properties fo:font-size="16pt" fo:font-weight="bold" style:font-size-asian="16pt" style:font-weight-asian="bold" style:font-name-complex="Calibri1" style:font-size-complex="16pt"/>
    </style:style>
    <style:style style:name="T20" style:family="text">
      <style:text-properties fo:color="#404040" loext:opacity="100%" fo:font-size="16pt" style:font-size-asian="16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21" style:family="text">
      <style:text-properties fo:color="#404040" loext:opacity="100%" fo:font-size="10pt" style:font-size-asian="10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font-size="10pt" fo:font-weight="bold" style:font-size-asian="10pt" style:font-weight-asian="bold" style:font-name-complex="Calibri1" style:font-size-complex="10pt"/>
    </style:style>
    <style:style style:name="T23" style:family="text">
      <style:text-properties fo:font-size="14pt" fo:font-weight="bold" style:font-size-asian="14pt" style:font-weight-asian="bold" style:font-name-complex="Calibri1" style:font-size-complex="14pt"/>
    </style:style>
    <style:style style:name="T24" style:family="text">
      <style:text-properties fo:color="#404040" loext:opacity="100%" fo:font-size="18pt" fo:font-weight="bold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5" style:family="text">
      <style:text-properties fo:font-size="18pt" fo:font-weight="bold" style:font-size-asian="18pt" style:font-weight-asian="bold" style:font-name-complex="Calibri1" style:font-size-complex="18pt"/>
    </style:style>
    <style:style style:name="T26" style:family="text">
      <style:text-properties fo:color="#404040" loext:opacity="100%" fo:font-size="8pt" fo:font-weight="bold" style:font-size-asian="8pt" style:font-weight-asian="bold" style:font-name-complex="Calibri1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7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8" style:family="text">
      <style:text-properties style:font-name-complex="Calibri1"/>
    </style:style>
    <style:style style:name="T29" style:family="text">
      <style:text-properties fo:color="#404040" loext:opacity="100%" fo:font-weight="bold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30" style:family="text">
      <style:text-properties fo:font-size="10pt" style:font-size-asian="10pt" style:font-name-complex="Calibri1" style:font-size-complex="10pt"/>
    </style:style>
    <style:style style:name="T31" style:family="text">
      <style:text-properties fo:color="#404040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2" style:family="text">
      <style:text-properties fo:color="#7f7f7f" loext:opacity="100%" fo:font-size="9pt" fo:font-style="italic" style:font-size-asian="9pt" style:font-style-asian="italic" style:font-name-complex="Calibri1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33" style:family="text">
      <style:text-properties fo:color="#404040" loext:opacity="100%" fo:font-size="10pt" fo:font-style="italic" style:font-size-asian="10pt" style:font-style-asian="italic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4" style:family="text">
      <style:text-properties fo:color="#7f7f7f" loext:opacity="100%" fo:font-size="10pt" fo:font-style="italic" style:font-size-asian="10pt" style:font-style-asian="italic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font-size="9pt" fo:font-style="italic" style:font-size-asian="9pt" style:font-style-asian="italic" style:font-name-complex="Calibri1" style:font-size-complex="9pt"/>
    </style:style>
    <style:style style:name="T36" style:family="text">
      <style:text-properties fo:font-size="10pt" fo:font-style="italic" style:font-size-asian="10pt" style:font-style-asian="italic" style:font-name-complex="Calibri1" style:font-size-complex="10pt"/>
    </style:style>
    <style:style style:name="T37" style:family="text">
      <style:text-properties fo:font-size="14pt" fo:font-style="italic" fo:font-weight="bold" style:font-size-asian="14pt" style:font-style-asian="italic" style:font-weight-asian="bold" style:font-name-complex="Calibri1" style:font-size-complex="14pt"/>
    </style:style>
    <style:style style:name="T38" style:family="text">
      <style:text-properties fo:color="#404040" loext:opacity="100%" style:font-name="Wingdings 3" fo:font-size="24pt" style:font-size-asian="24pt" style:font-name-complex="Calibri1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39" style:family="text">
      <style:text-properties fo:color="#d60093" loext:opacity="100%" style:font-name="Wingdings 3" fo:font-size="24pt" style:font-size-asian="24pt" style:font-name-complex="Calibri1" style:font-size-complex="24pt"/>
    </style:style>
    <style:style style:name="T40" style:family="text">
      <style:text-properties fo:color="#404040" loext:opacity="100%" fo:font-size="24pt" fo:font-weight="bold" style:font-size-asian="24pt" style:font-weight-asian="bold" style:font-name-complex="Calibri1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41" style:family="text">
      <style:text-properties fo:color="#d60093" loext:opacity="100%" fo:font-size="24pt" fo:font-weight="bold" style:font-size-asian="24pt" style:font-weight-asian="bold" style:font-name-complex="Calibri1" style:font-size-complex="24pt"/>
    </style:style>
    <style:style style:name="T42" style:family="text">
      <style:text-properties fo:color="#404040" loext:opacity="100%" fo:font-weight="bold" style:language-asian="fr" style:country-asian="FR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43" style:family="text">
      <style:text-properties fo:font-size="12pt" fo:font-weight="bold" style:font-size-asian="12pt" style:font-weight-asian="bold" style:font-name-complex="Calibri1" style:font-size-complex="12pt"/>
    </style:style>
    <style:style style:name="T44" style:family="text">
      <style:text-properties fo:font-size="12pt" fo:font-weight="bold" style:font-size-asian="12pt" style:language-asian="fr" style:country-asian="FR" style:font-weight-asian="bold" style:font-name-complex="Calibri1" style:font-size-complex="12pt"/>
    </style:style>
    <style:style style:name="T45" style:family="text">
      <style:text-properties fo:color="#404040" loext:opacity="100%" fo:font-size="12pt" fo:font-weight="bold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6" style:family="text">
      <style:text-properties fo:color="#404040" loext:opacity="100%" officeooo:rsid="000fcf1a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47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48" style:family="text">
      <style:text-properties fo:color="#404040" loext:opacity="100%" fo:font-size="6pt" style:font-size-asian="6pt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49" style:family="text">
      <style:text-properties fo:color="#404040" loext:opacity="100%" officeooo:rsid="004b7c05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50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51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52" style:family="text">
      <style:text-properties fo:font-variant="small-caps" fo:font-size="48pt" fo:font-weight="bold" style:font-size-asian="48pt" style:font-weight-asian="bold" style:font-name-complex="Calibri1" style:font-size-complex="48pt"/>
    </style:style>
    <style:style style:name="T53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54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55" style:family="text">
      <style:text-properties fo:color="#404040" loext:opacity="100%" fo:font-style="italic" fo:font-weight="bold" style:font-style-asian="italic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56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57" style:family="text">
      <style:text-properties fo:font-weight="bold" style:font-weight-asian="bold" style:font-name-complex="Calibri1"/>
    </style:style>
    <style:style style:name="T58" style:family="text">
      <style:text-properties fo:font-size="10pt" officeooo:rsid="001d11b6" style:font-size-asian="10pt" style:font-size-complex="10pt"/>
    </style:style>
    <style:style style:name="T59" style:family="text">
      <style:text-properties fo:font-size="10pt" officeooo:rsid="001ef33e" style:font-size-asian="10pt" style:font-size-complex="10pt"/>
    </style:style>
    <style:style style:name="T60" style:family="text">
      <style:text-properties fo:font-size="10pt" officeooo:rsid="0020ddd0" style:font-size-asian="10pt" style:font-size-complex="10pt"/>
    </style:style>
    <style:style style:name="T61" style:family="text">
      <style:text-properties fo:font-size="10pt" officeooo:rsid="002355e9" style:font-size-asian="10pt" style:font-size-complex="10pt"/>
    </style:style>
    <style:style style:name="T62" style:family="text">
      <style:text-properties fo:font-size="10pt" fo:font-weight="bold" officeooo:rsid="001d11b6" style:font-size-asian="10pt" style:font-weight-asian="bold" style:font-size-complex="10pt" style:font-weight-complex="bold"/>
    </style:style>
    <style:style style:name="T63" style:family="text">
      <style:text-properties fo:font-size="10pt" fo:font-style="italic" officeooo:rsid="001d11b6" style:font-size-asian="10pt" style:font-style-asian="italic" style:font-size-complex="10pt" style:font-style-complex="italic"/>
    </style:style>
    <style:style style:name="T64" style:family="text">
      <style:text-properties fo:font-size="10pt" fo:font-style="italic" officeooo:rsid="0020ddd0" style:font-size-asian="10pt" style:font-style-asian="italic" style:font-size-complex="10pt" style:font-style-complex="italic"/>
    </style:style>
    <style:style style:name="T65" style:family="text">
      <style:text-properties fo:font-size="10pt" fo:font-style="normal" officeooo:rsid="001d11b6" style:font-size-asian="10pt" style:font-style-asian="normal" style:font-size-complex="10pt" style:font-style-complex="normal"/>
    </style:style>
    <style:style style:name="T66" style:family="text">
      <style:text-properties fo:font-size="10pt" fo:font-style="normal" officeooo:rsid="0035398c" style:font-size-asian="10pt" style:font-style-asian="normal" style:font-size-complex="10pt" style:font-style-complex="normal"/>
    </style:style>
    <style:style style:name="T67" style:family="text">
      <style:text-properties fo:font-size="10pt" fo:font-style="italic" officeooo:rsid="0035398c" style:font-size-asian="10pt" style:font-style-asian="italic" style:font-size-complex="10pt" style:font-style-complex="italic"/>
    </style:style>
    <style:style style:name="T68" style:family="text">
      <style:text-properties fo:font-size="10pt" officeooo:rsid="002272b7" style:font-size-asian="10pt" style:font-size-complex="10pt"/>
    </style:style>
    <style:style style:name="T69" style:family="text">
      <style:text-properties fo:font-size="10pt" officeooo:rsid="002a163b" style:font-size-asian="10pt" style:font-size-complex="10pt"/>
    </style:style>
    <style:style style:name="T70" style:family="text">
      <style:text-properties fo:font-size="10pt" officeooo:rsid="00247dc5" style:font-size-asian="10pt" style:font-size-complex="10pt"/>
    </style:style>
    <style:style style:name="T71" style:family="text">
      <style:text-properties fo:font-size="10pt" fo:font-weight="bold" officeooo:rsid="002355e9" style:font-size-asian="10pt" style:font-weight-asian="bold" style:font-size-complex="10pt" style:font-weight-complex="bold"/>
    </style:style>
    <style:style style:name="T72" style:family="text">
      <style:text-properties fo:font-size="10pt" fo:font-style="italic" fo:font-weight="normal" officeooo:rsid="001ef33e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font-size="10pt" officeooo:rsid="00555fa8" style:font-size-asian="10pt" style:font-size-complex="10pt"/>
    </style:style>
    <style:style style:name="T74" style:family="text">
      <style:text-properties fo:font-size="10pt" fo:font-weight="bold" officeooo:rsid="00247dc5" style:font-size-asian="10pt" style:font-weight-asian="bold" style:font-size-complex="10pt" style:font-weight-complex="bold"/>
    </style:style>
    <style:style style:name="T75" style:family="text">
      <style:text-properties fo:font-size="10pt" fo:font-weight="normal" officeooo:rsid="00247dc5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2df27e" style:font-size-asian="10pt" style:font-weight-asian="normal" style:font-size-complex="10pt" style:font-weight-complex="normal"/>
    </style:style>
    <style:style style:name="T77" style:family="text">
      <style:text-properties fo:font-size="10pt" fo:font-weight="normal" officeooo:rsid="00555fa8" style:font-size-asian="10pt" style:font-weight-asian="normal" style:font-size-complex="10pt" style:font-weight-complex="normal"/>
    </style:style>
    <style:style style:name="T78" style:family="text">
      <style:text-properties fo:font-size="10pt" officeooo:rsid="002df27e" style:font-size-asian="10pt" style:font-size-complex="10pt"/>
    </style:style>
    <style:style style:name="T79" style:family="text">
      <style:text-properties fo:font-size="10pt" officeooo:rsid="002678bd" style:font-size-asian="10pt" style:font-size-complex="10pt"/>
    </style:style>
    <style:style style:name="T80" style:family="text">
      <style:text-properties fo:font-size="10pt" officeooo:rsid="0022cb1a" style:font-size-asian="10pt" style:font-size-complex="10pt"/>
    </style:style>
    <style:style style:name="T81" style:family="text">
      <style:text-properties fo:font-size="10pt" fo:font-weight="bold" officeooo:rsid="0022cb1a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0269e64" style:font-size-asian="10pt" style:font-weight-asian="bold" style:font-size-complex="10pt" style:font-weight-complex="bold"/>
    </style:style>
    <style:style style:name="T83" style:family="text">
      <style:text-properties fo:font-size="10pt" officeooo:rsid="002c05a9" style:font-size-asian="10pt" style:font-size-complex="10pt"/>
    </style:style>
    <style:style style:name="T84" style:family="text">
      <style:text-properties fo:font-size="10pt" officeooo:rsid="002ccb82" style:font-size-asian="10pt" style:font-size-complex="10pt"/>
    </style:style>
    <style:style style:name="T85" style:family="text">
      <style:text-properties fo:font-size="10pt" officeooo:rsid="002ee5a8" style:font-size-asian="10pt" style:font-size-complex="10pt"/>
    </style:style>
    <style:style style:name="T86" style:family="text">
      <style:text-properties fo:font-size="10pt" officeooo:rsid="0035398c" style:font-size-asian="10pt" style:font-size-complex="10pt"/>
    </style:style>
    <style:style style:name="T87" style:family="text">
      <style:text-properties fo:font-size="10pt" fo:font-weight="bold" officeooo:rsid="002a163b" style:font-size-asian="10pt" style:font-weight-asian="bold" style:font-size-complex="10pt" style:font-weight-complex="bold"/>
    </style:style>
    <style:style style:name="T88" style:family="text">
      <style:text-properties fo:font-size="10pt" officeooo:rsid="003bfa76" style:font-size-asian="10pt" style:font-size-complex="10pt"/>
    </style:style>
    <style:style style:name="T89" style:family="text">
      <style:text-properties fo:font-size="10pt" officeooo:rsid="002ef3ad" style:font-size-asian="10pt" style:font-size-complex="10pt"/>
    </style:style>
    <style:style style:name="T90" style:family="text">
      <style:text-properties fo:font-size="10pt" officeooo:rsid="003c884c" style:font-size-asian="10pt" style:font-size-complex="10pt"/>
    </style:style>
    <style:style style:name="T91" style:family="text">
      <style:text-properties fo:font-size="10pt" officeooo:rsid="0030937b" style:font-size-asian="10pt" style:font-size-complex="10pt"/>
    </style:style>
    <style:style style:name="T92" style:family="text">
      <style:text-properties fo:font-size="10pt" fo:font-style="italic" officeooo:rsid="001ef33e" style:font-size-asian="10pt" style:font-style-asian="italic" style:font-size-complex="10pt" style:font-style-complex="italic"/>
    </style:style>
    <style:style style:name="T93" style:family="text">
      <style:text-properties fo:font-size="10pt" fo:font-style="italic" officeooo:rsid="003bfa76" style:font-size-asian="10pt" style:font-style-asian="italic" style:font-size-complex="10pt" style:font-style-complex="italic"/>
    </style:style>
    <style:style style:name="T94" style:family="text">
      <style:text-properties fo:font-size="10pt" officeooo:rsid="0032c65d" style:font-size-asian="10pt" style:font-size-complex="10pt"/>
    </style:style>
    <style:style style:name="T95" style:family="text">
      <style:text-properties fo:font-size="10pt" officeooo:rsid="0032f7d5" style:font-size-asian="10pt" style:font-size-complex="10pt"/>
    </style:style>
    <style:style style:name="T96" style:family="text">
      <style:text-properties fo:font-size="10pt" officeooo:rsid="007b5cec" style:font-size-asian="10pt" style:font-size-complex="10pt"/>
    </style:style>
    <style:style style:name="T97" style:family="text">
      <style:text-properties fo:font-size="10pt" officeooo:rsid="00330d8c" style:font-size-asian="10pt" style:font-size-complex="10pt"/>
    </style:style>
    <style:style style:name="T98" style:family="text">
      <style:text-properties fo:font-size="10pt" officeooo:rsid="0039aad5" style:font-size-asian="10pt" style:font-size-complex="10pt"/>
    </style:style>
    <style:style style:name="T99" style:family="text">
      <style:text-properties fo:font-size="10pt" fo:font-weight="normal" officeooo:rsid="0032f7d5" style:font-size-asian="10pt" style:font-weight-asian="normal" style:font-size-complex="10pt" style:font-weight-complex="normal"/>
    </style:style>
    <style:style style:name="T100" style:family="text">
      <style:text-properties fo:font-size="10pt" fo:font-weight="normal" officeooo:rsid="001ef33e" style:font-size-asian="10pt" style:font-weight-asian="normal" style:font-size-complex="10pt" style:font-weight-complex="normal"/>
    </style:style>
    <style:style style:name="T101" style:family="text">
      <style:text-properties fo:font-size="10pt" officeooo:rsid="0033d6f3" style:font-size-asian="10pt" style:font-size-complex="10pt"/>
    </style:style>
    <style:style style:name="T102" style:family="text">
      <style:text-properties fo:font-size="10pt" officeooo:rsid="005b5074" style:font-size-asian="10pt" style:font-size-complex="10pt"/>
    </style:style>
    <style:style style:name="T103" style:family="text">
      <style:text-properties fo:font-size="10pt" fo:font-weight="bold" officeooo:rsid="0032c65d" style:font-size-asian="10pt" style:font-weight-asian="bold" style:font-size-complex="10pt" style:font-weight-complex="bold"/>
    </style:style>
    <style:style style:name="T104" style:family="text">
      <style:text-properties fo:font-size="10pt" fo:font-weight="normal" officeooo:rsid="0032c65d" style:font-size-asian="10pt" style:font-weight-asian="normal" style:font-size-complex="10pt" style:font-weight-complex="normal"/>
    </style:style>
    <style:style style:name="T105" style:family="text">
      <style:text-properties fo:font-size="10pt" fo:font-style="italic" officeooo:rsid="0041227a" style:font-size-asian="10pt" style:font-style-asian="italic" style:font-size-complex="10pt" style:font-style-complex="italic"/>
    </style:style>
    <style:style style:name="T106" style:family="text">
      <style:text-properties fo:font-size="10pt" fo:font-style="italic" officeooo:rsid="0032f7d5" style:font-size-asian="10pt" style:font-style-asian="italic" style:font-size-complex="10pt" style:font-style-complex="italic"/>
    </style:style>
    <style:style style:name="T107" style:family="text">
      <style:text-properties fo:font-size="10pt" officeooo:rsid="00638b20" style:font-size-asian="10pt" style:font-size-complex="10pt"/>
    </style:style>
    <style:style style:name="T108" style:family="text">
      <style:text-properties fo:color="#004586" loext:opacity="100%" fo:font-size="10pt" officeooo:rsid="00330d8c" fo:background-color="#ffd320" loext:char-shading-value="0" style:font-size-asian="10pt" style:font-size-complex="10pt"/>
    </style:style>
    <style:style style:name="T109" style:family="text">
      <style:text-properties fo:color="#004586" loext:opacity="100%" fo:font-size="10pt" officeooo:rsid="0033d6f3" fo:background-color="#ffd320" loext:char-shading-value="0" style:font-size-asian="10pt" style:font-size-complex="10pt"/>
    </style:style>
    <style:style style:name="T110" style:family="text">
      <style:text-properties fo:color="#004586" loext:opacity="100%" fo:font-size="10pt" fo:font-style="italic" officeooo:rsid="00330d8c" fo:background-color="#ffd320" loext:char-shading-value="0" style:font-size-asian="10pt" style:font-style-asian="italic" style:font-size-complex="10pt" style:font-style-complex="italic"/>
    </style:style>
    <style:style style:name="T111" style:family="text">
      <style:text-properties fo:color="#004586" loext:opacity="100%" fo:font-size="10pt" officeooo:rsid="004308bb" fo:background-color="#ffd320" loext:char-shading-value="0" style:font-size-asian="10pt" style:font-size-complex="10pt"/>
    </style:style>
    <style:style style:name="T112" style:family="text">
      <style:text-properties fo:color="#004586" loext:opacity="100%" fo:font-size="10pt" fo:font-style="italic" officeooo:rsid="004308bb" fo:background-color="#ffd320" loext:char-shading-value="0" style:font-size-asian="10pt" style:font-style-asian="italic" style:font-size-complex="10pt" style:font-style-complex="italic"/>
    </style:style>
    <style:style style:name="T113" style:family="text">
      <style:text-properties fo:font-size="10pt" officeooo:rsid="004073dd" style:font-size-asian="10pt" style:font-size-complex="10pt"/>
    </style:style>
    <style:style style:name="T114" style:family="text">
      <style:text-properties fo:font-size="10pt" officeooo:rsid="002749a1" style:font-size-asian="10pt" style:font-size-complex="10pt"/>
    </style:style>
    <style:style style:name="T115" style:family="text">
      <style:text-properties fo:font-size="10pt" fo:font-weight="bold" officeooo:rsid="0039aad5" style:font-size-asian="10pt" style:font-weight-asian="bold" style:font-size-complex="10pt" style:font-weight-complex="bold"/>
    </style:style>
    <style:style style:name="T116" style:family="text">
      <style:text-properties fo:font-size="10pt" fo:font-weight="normal" officeooo:rsid="0039aad5" style:font-size-asian="10pt" style:font-weight-asian="normal" style:font-size-complex="10pt" style:font-weight-complex="normal"/>
    </style:style>
    <style:style style:name="T117" style:family="text">
      <style:text-properties fo:font-size="10pt" fo:font-weight="normal" officeooo:rsid="0039de9a" style:font-size-asian="10pt" style:font-weight-asian="normal" style:font-size-complex="10pt" style:font-weight-complex="normal"/>
    </style:style>
    <style:style style:name="T118" style:family="text">
      <style:text-properties fo:font-size="10pt" fo:font-weight="normal" officeooo:rsid="003c884c" style:font-size-asian="10pt" style:font-weight-asian="normal" style:font-size-complex="10pt" style:font-weight-complex="normal"/>
    </style:style>
    <style:style style:name="T119" style:family="text">
      <style:text-properties fo:font-size="10pt" fo:font-style="normal" fo:font-weight="bold" officeooo:rsid="004073dd" style:font-size-asian="10pt" style:font-style-asian="normal" style:font-weight-asian="bold" style:font-size-complex="10pt" style:font-style-complex="normal" style:font-weight-complex="bold"/>
    </style:style>
    <style:style style:name="T120" style:family="text">
      <style:text-properties fo:font-size="10pt" fo:font-weight="bold" officeooo:rsid="002749a1" style:font-size-asian="10pt" style:font-weight-asian="bold" style:font-size-complex="10pt" style:font-weight-complex="bold"/>
    </style:style>
    <style:style style:name="T121" style:family="text">
      <style:text-properties fo:font-size="10pt" fo:font-style="italic" officeooo:rsid="004073dd" style:font-size-asian="10pt" style:font-style-asian="italic" style:font-size-complex="10pt" style:font-style-complex="italic"/>
    </style:style>
    <style:style style:name="T122" style:family="text">
      <style:text-properties fo:font-size="10pt" fo:font-style="italic" officeooo:rsid="002749a1" style:font-size-asian="10pt" style:font-style-asian="italic" style:font-size-complex="10pt" style:font-style-complex="italic"/>
    </style:style>
    <style:style style:name="T123" style:family="text">
      <style:text-properties fo:font-size="10pt" fo:font-weight="bold" officeooo:rsid="001ef33e" style:font-size-asian="10pt" style:font-weight-asian="bold" style:font-size-complex="10pt" style:font-weight-complex="bold"/>
    </style:style>
    <style:style style:name="T124" style:family="text">
      <style:text-properties fo:font-size="10pt" officeooo:rsid="00437979" style:font-size-asian="10pt" style:font-size-complex="10pt"/>
    </style:style>
    <style:style style:name="T125" style:family="text">
      <style:text-properties fo:font-size="10pt" fo:font-weight="bold" officeooo:rsid="00437979" style:font-size-asian="10pt" style:font-weight-asian="bold" style:font-size-complex="10pt" style:font-weight-complex="bold"/>
    </style:style>
    <style:style style:name="T126" style:family="text">
      <style:text-properties fo:font-size="10pt" officeooo:rsid="0048ce78" style:font-size-asian="10pt" style:font-size-complex="10pt"/>
    </style:style>
    <style:style style:name="T127" style:family="text">
      <style:text-properties fo:font-size="10pt" officeooo:rsid="004da4aa" style:font-size-asian="10pt" style:font-size-complex="10pt"/>
    </style:style>
    <style:style style:name="T128" style:family="text">
      <style:text-properties fo:font-size="10pt" fo:font-weight="bold" officeooo:rsid="0048ce78" style:font-size-asian="10pt" style:font-weight-asian="bold" style:font-size-complex="10pt" style:font-weight-complex="bold"/>
    </style:style>
    <style:style style:name="T129" style:family="text">
      <style:text-properties fo:font-size="10pt" fo:font-weight="normal" officeooo:rsid="0048ce78" style:font-size-asian="10pt" style:font-weight-asian="normal" style:font-size-complex="10pt" style:font-weight-complex="normal"/>
    </style:style>
    <style:style style:name="T130" style:family="text">
      <style:text-properties fo:font-size="10pt" fo:font-weight="normal" officeooo:rsid="00590fe2" style:font-size-asian="10pt" style:font-weight-asian="normal" style:font-size-complex="10pt" style:font-weight-complex="normal"/>
    </style:style>
    <style:style style:name="T131" style:family="text">
      <style:text-properties fo:font-size="10pt" fo:font-weight="normal" officeooo:rsid="005b3c29" style:font-size-asian="10pt" style:font-weight-asian="normal" style:font-size-complex="10pt" style:font-weight-complex="normal"/>
    </style:style>
    <style:style style:name="T132" style:family="text">
      <style:text-properties fo:font-size="10pt" fo:font-weight="normal" officeooo:rsid="006700a2" style:font-size-asian="10pt" style:font-weight-asian="normal" style:font-size-complex="10pt" style:font-weight-complex="normal"/>
    </style:style>
    <style:style style:name="T133" style:family="text">
      <style:text-properties fo:font-size="10pt" fo:font-weight="normal" officeooo:rsid="005b26e3" style:font-size-asian="10pt" style:font-weight-asian="normal" style:font-size-complex="10pt" style:font-weight-complex="normal"/>
    </style:style>
    <style:style style:name="T134" style:family="text">
      <style:text-properties fo:font-size="10pt" fo:font-weight="normal" officeooo:rsid="004073dd" style:font-size-asian="10pt" style:font-weight-asian="normal" style:font-size-complex="10pt" style:font-weight-complex="normal"/>
    </style:style>
    <style:style style:name="T135" style:family="text">
      <style:text-properties fo:font-size="10pt" fo:font-style="italic" fo:font-weight="normal" officeooo:rsid="003c884c" style:font-size-asian="10pt" style:font-style-asian="italic" style:font-weight-asian="normal" style:font-size-complex="10pt" style:font-style-complex="italic" style:font-weight-complex="normal"/>
    </style:style>
    <style:style style:name="T136" style:family="text">
      <style:text-properties fo:font-size="10pt" fo:font-weight="bold" officeooo:rsid="004073dd" style:font-size-asian="10pt" style:font-weight-asian="bold" style:font-size-complex="10pt" style:font-weight-complex="bold"/>
    </style:style>
    <style:style style:name="T137" style:family="text">
      <style:text-properties fo:font-size="10pt" fo:font-style="italic" fo:font-weight="normal" officeooo:rsid="004073dd" style:font-size-asian="10pt" style:font-style-asian="italic" style:font-weight-asian="normal" style:font-size-complex="10pt" style:font-style-complex="italic" style:font-weight-complex="normal"/>
    </style:style>
    <style:style style:name="T138" style:family="text">
      <style:text-properties fo:font-size="10pt" fo:font-style="normal" fo:font-weight="normal" officeooo:rsid="004073dd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ize="10pt" fo:font-weight="normal" officeooo:rsid="003db292" style:font-size-asian="10pt" style:font-weight-asian="normal" style:font-size-complex="10pt" style:font-weight-complex="normal"/>
    </style:style>
    <style:style style:name="T140" style:family="text">
      <style:text-properties fo:font-size="10pt" fo:font-weight="normal" officeooo:rsid="0041227a" style:font-size-asian="10pt" style:font-weight-asian="normal" style:font-size-complex="10pt" style:font-weight-complex="normal"/>
    </style:style>
    <style:style style:name="T141" style:family="text">
      <style:text-properties fo:font-size="10pt" fo:font-weight="normal" officeooo:rsid="003f4675" style:font-size-asian="10pt" style:font-weight-asian="normal" style:font-size-complex="10pt" style:font-weight-complex="normal"/>
    </style:style>
    <style:style style:name="T142" style:family="text">
      <style:text-properties style:font-name="Calibri" fo:font-size="10pt" fo:language="fr" fo:country="FR" fo:font-weight="normal" officeooo:rsid="0047ae17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43" style:family="text">
      <style:text-properties style:font-name="Calibri" fo:font-size="10pt" fo:language="fr" fo:country="FR" fo:font-weight="normal" officeooo:rsid="004093fb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44" style:family="text">
      <style:text-properties style:font-name="Calibri" fo:font-size="10pt" fo:language="fr" fo:country="FR" fo:font-weight="normal" officeooo:rsid="0058c970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45" style:family="text">
      <style:text-properties style:font-name="Calibri" fo:font-size="10pt" fo:language="fr" fo:country="FR" fo:font-weight="normal" officeooo:rsid="005b3c29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46" style:family="text">
      <style:text-properties style:font-name="Calibri" fo:font-size="10pt" fo:language="fr" fo:country="FR" fo:font-weight="bold" officeooo:rsid="0047ae17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147" style:family="text">
      <style:text-properties style:font-name="Calibri" fo:font-size="10pt" fo:language="fr" fo:country="FR" officeooo:rsid="0047ae17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48" style:family="text">
      <style:text-properties style:font-name="Calibri" fo:font-size="10pt" fo:language="fr" fo:country="FR" officeooo:rsid="004093f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49" style:family="text">
      <style:text-properties style:font-name="Calibri" fo:font-size="10pt" fo:language="fr" fo:country="FR" fo:font-weight="bold" officeooo:rsid="004f613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150" style:family="text">
      <style:text-properties style:font-name="Calibri" fo:font-size="10pt" fo:language="fr" fo:country="FR" officeooo:rsid="004f613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1" style:family="text">
      <style:text-properties style:font-name="Calibri" fo:font-size="10pt" fo:language="fr" fo:country="FR" officeooo:rsid="005fd482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2" style:family="text">
      <style:text-properties officeooo:rsid="00625efb"/>
    </style:style>
    <style:style style:name="T153" style:family="text">
      <style:text-properties style:font-name="Calibri" fo:font-size="10pt" fo:language="fr" fo:country="FR" officeooo:rsid="00625ef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4" style:family="text">
      <style:text-properties style:font-name="Calibri" fo:font-size="10pt" fo:language="fr" fo:country="FR" officeooo:rsid="0072ce15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5" style:family="text">
      <style:text-properties style:font-name="Calibri" fo:font-size="10pt" fo:language="fr" fo:country="FR" officeooo:rsid="00638b20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6" style:family="text">
      <style:text-properties style:font-name="Calibri" fo:font-size="10pt" fo:language="fr" fo:country="FR" officeooo:rsid="00715975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57" style:family="text">
      <style:text-properties fo:font-size="10pt" fo:language="fr" fo:country="FR" fo:font-style="italic" officeooo:rsid="00625efb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158" style:family="text">
      <style:text-properties fo:font-size="10pt" fo:language="fr" fo:country="FR" fo:font-style="italic" officeooo:rsid="00715975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159" style:family="text">
      <style:text-properties style:font-name="Calibri" fo:font-size="10pt" fo:language="fr" fo:country="FR" officeooo:rsid="006bce23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60" style:family="text">
      <style:text-properties style:font-name="Calibri" fo:font-size="10pt" fo:language="fr" fo:country="FR" officeooo:rsid="0064bf87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61" style:family="text">
      <style:text-properties style:font-name="Calibri" fo:font-size="10pt" fo:language="fr" fo:country="FR" officeooo:rsid="00686c43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62" style:family="text">
      <style:text-properties style:font-name="Calibri" fo:font-size="10pt" fo:language="fr" fo:country="FR" fo:font-style="italic" officeooo:rsid="00686c43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163" style:family="text">
      <style:text-properties style:font-name="Calibri" fo:font-size="10pt" fo:language="fr" fo:country="FR" officeooo:rsid="0060d33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64" style:family="text">
      <style:text-properties style:font-name="Calibri" fo:font-size="10pt" fo:language="fr" fo:country="FR" fo:font-style="italic" officeooo:rsid="0060d33d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165" style:family="text">
      <style:text-properties officeooo:rsid="007e1adb"/>
    </style:style>
    <style:style style:name="T166" style:family="text">
      <style:text-properties officeooo:rsid="00715975"/>
    </style:style>
    <style:style style:name="T167" style:family="text">
      <style:text-properties officeooo:rsid="006ce809"/>
    </style:style>
    <style:style style:name="T168" style:family="text">
      <style:text-properties officeooo:rsid="007c55a0"/>
    </style:style>
    <style:style style:name="T169" style:family="text">
      <style:text-properties fo:font-style="italic" officeooo:rsid="00715975" style:font-style-asian="italic" style:font-style-complex="italic"/>
    </style:style>
    <style:style style:name="T170" style:family="text">
      <style:text-properties officeooo:rsid="007c80a3"/>
    </style:style>
    <style:style style:name="T171" style:family="text">
      <style:text-properties fo:font-style="italic" officeooo:rsid="007e1adb" style:font-style-asian="italic" style:font-style-complex="italic"/>
    </style:style>
    <style:style style:name="T172" style:family="text">
      <style:text-properties fo:font-style="normal" officeooo:rsid="007e1adb" style:font-style-asian="normal" style:font-style-complex="normal"/>
    </style:style>
    <style:style style:name="T173" style:family="text">
      <style:text-properties fo:font-size="10pt" officeooo:rsid="004f613d" style:font-size-asian="10pt" style:font-size-complex="10pt"/>
    </style:style>
    <style:style style:name="T174" style:family="text">
      <style:text-properties fo:font-size="10pt" fo:font-weight="bold" officeooo:rsid="004f613d" style:font-size-asian="10pt" style:font-weight-asian="bold" style:font-size-complex="10pt" style:font-weight-complex="bold"/>
    </style:style>
    <style:style style:name="T175" style:family="text">
      <style:text-properties fo:font-size="10pt" fo:font-style="italic" officeooo:rsid="004f613d" style:font-size-asian="10pt" style:font-style-asian="italic" style:font-size-complex="10pt" style:font-style-complex="italic"/>
    </style:style>
    <style:style style:name="T176" style:family="text">
      <style:text-properties fo:font-size="10pt" officeooo:rsid="00625efb" style:font-size-asian="10pt" style:font-size-complex="10pt"/>
    </style:style>
    <style:style style:name="T177" style:family="text">
      <style:text-properties fo:color="#800000" loext:opacity="100%" fo:font-size="10pt" fo:font-weight="bold" officeooo:rsid="004f613d" style:font-size-asian="10pt" style:font-weight-asian="bold" style:font-size-complex="10pt" style:font-weight-complex="bold"/>
    </style:style>
    <style:style style:name="T178" style:family="text">
      <style:text-properties fo:color="#004586" loext:opacity="100%" fo:font-size="10pt" fo:font-weight="bold" officeooo:rsid="004f613d" style:font-size-asian="10pt" style:font-weight-asian="bold" style:font-size-complex="10pt" style:font-weight-complex="bold"/>
    </style:style>
    <style:style style:name="T179" style:family="text">
      <style:text-properties fo:font-size="10pt" officeooo:rsid="0064bf87" style:font-size-asian="10pt" style:font-size-complex="10pt"/>
    </style:style>
    <style:style style:name="T180" style:family="text">
      <style:text-properties style:font-name="Calibri" fo:font-size="10pt" fo:language="fr" fo:country="FR" fo:font-weight="normal" officeooo:rsid="005decf7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81" style:family="text">
      <style:text-properties fo:font-size="10pt" fo:font-weight="normal" officeooo:rsid="00625efb" style:font-size-asian="10pt" style:font-weight-asian="normal" style:font-size-complex="10pt" style:font-weight-complex="normal"/>
    </style:style>
    <style:style style:name="T182" style:family="text">
      <style:text-properties fo:font-size="10pt" fo:font-weight="normal" officeooo:rsid="005decf7" style:font-size-asian="10pt" style:font-weight-asian="normal" style:font-size-complex="10pt" style:font-weight-complex="normal"/>
    </style:style>
    <style:style style:name="T183" style:family="text">
      <style:text-properties fo:font-size="10pt" fo:font-weight="normal" officeooo:rsid="007c80a3" style:font-size-asian="10pt" style:font-weight-asian="normal" style:font-size-complex="10pt" style:font-weight-complex="normal"/>
    </style:style>
    <style:style style:name="T184" style:family="text">
      <style:text-properties fo:font-size="10pt" fo:font-weight="bold" officeooo:rsid="005decf7" style:font-size-asian="10pt" style:font-weight-asian="bold" style:font-size-complex="10pt" style:font-weight-complex="bold"/>
    </style:style>
    <style:style style:name="T185" style:family="text">
      <style:text-properties fo:font-size="10pt" fo:font-weight="normal" officeooo:rsid="0072ce15" style:font-size-asian="10pt" style:font-weight-asian="normal" style:font-size-complex="10pt" style:font-weight-complex="normal"/>
    </style:style>
    <style:style style:name="T186" style:family="text">
      <style:text-properties fo:font-size="10pt" fo:font-weight="bold" officeooo:rsid="0072ce15" style:font-size-asian="10pt" style:font-weight-asian="bold" style:font-size-complex="10pt" style:font-weight-complex="bold"/>
    </style:style>
    <style:style style:name="T187" style:family="text">
      <style:text-properties style:font-name="Calibri" fo:font-size="11pt" fo:language="fr" fo:country="FR" fo:font-weight="normal" officeooo:rsid="0047ae17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88" style:family="text">
      <style:text-properties officeooo:rsid="002355e9"/>
    </style:style>
    <style:style style:name="T189" style:family="text">
      <style:text-properties officeooo:rsid="004f613d"/>
    </style:style>
    <style:style style:name="T190" style:family="text">
      <style:text-properties officeooo:rsid="005b5074"/>
    </style:style>
    <style:style style:name="T191" style:family="text">
      <style:text-properties fo:font-weight="normal" officeooo:rsid="004f613d" style:font-weight-asian="normal" style:font-weight-complex="normal"/>
    </style:style>
    <style:style style:name="T192" style:family="text">
      <style:text-properties fo:font-weight="normal" officeooo:rsid="005b5074" style:font-weight-asian="normal" style:font-weight-complex="normal"/>
    </style:style>
    <style:style style:name="T193" style:family="text">
      <style:text-properties fo:font-weight="normal" officeooo:rsid="006de6dd" style:font-weight-asian="normal" style:font-weight-complex="normal"/>
    </style:style>
    <style:style style:name="T194" style:family="text">
      <style:text-properties fo:font-weight="normal" officeooo:rsid="006bce23" style:font-weight-asian="normal" style:font-weight-complex="normal"/>
    </style:style>
    <style:style style:name="T195" style:family="text">
      <style:text-properties fo:font-style="italic" fo:font-weight="normal" officeooo:rsid="006bce23" style:font-style-asian="italic" style:font-weight-asian="normal" style:font-style-complex="italic" style:font-weight-complex="normal"/>
    </style:style>
    <style:style style:name="T196" style:family="text">
      <style:text-properties fo:font-style="italic" fo:font-weight="normal" officeooo:rsid="006de6dd" style:font-style-asian="italic" style:font-weight-asian="normal" style:font-style-complex="italic" style:font-weight-complex="normal"/>
    </style:style>
    <style:style style:name="T197" style:family="text">
      <style:text-properties style:font-name="Calibri" fo:font-size="10pt" fo:language="fr" fo:country="FR" officeooo:rsid="004308b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98" style:family="text">
      <style:text-properties style:font-name="Calibri" fo:font-size="10pt" fo:language="fr" fo:country="FR" officeooo:rsid="0044c9e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99" style:family="text">
      <style:text-properties style:font-name="Calibri" fo:font-size="10pt" fo:language="fr" fo:country="FR" fo:font-weight="bold" officeooo:rsid="0044c9eb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200" style:family="text">
      <style:text-properties style:font-name="Calibri" fo:font-size="10pt" fo:language="fr" fo:country="FR" fo:font-weight="normal" officeooo:rsid="004664d2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201" style:family="text">
      <style:text-properties style:font-name="Calibri" fo:font-size="10pt" fo:language="fr" fo:country="FR" fo:font-weight="normal" officeooo:rsid="0044c9eb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202" style:family="text">
      <style:text-properties style:font-name="Calibri" fo:font-size="10pt" fo:language="fr" fo:country="FR" fo:font-weight="normal" officeooo:rsid="00481ddd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203" style:family="text">
      <style:text-properties style:font-name="Calibri" fo:font-size="10pt" fo:language="fr" fo:country="FR" officeooo:rsid="004664d2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204" style:family="text">
      <style:text-properties style:font-name="Calibri" fo:font-size="10pt" fo:language="fr" fo:country="FR" fo:font-weight="bold" officeooo:rsid="004664d2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205" style:family="text">
      <style:text-properties style:font-name="Calibri" fo:font-size="10pt" fo:language="fr" fo:country="FR" officeooo:rsid="007588b3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206" style:family="text">
      <style:text-properties style:font-name="Calibri" fo:font-size="10pt" fo:language="fr" fo:country="FR" fo:font-style="italic" officeooo:rsid="004664d2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207" style:family="text">
      <style:text-properties style:font-name="Calibri" fo:font-size="10pt" fo:language="fr" fo:country="FR" fo:font-style="italic" officeooo:rsid="007588b3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208" style:family="text">
      <style:text-properties style:font-name="Calibri" fo:font-size="10pt" fo:language="fr" fo:country="FR" fo:font-style="italic" officeooo:rsid="007731fa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209" style:family="text">
      <style:text-properties style:font-name="Calibri" fo:font-size="10pt" fo:language="fr" fo:country="FR" officeooo:rsid="007731fa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210" style:family="text">
      <style:text-properties style:font-name="Calibri" fo:font-size="10pt" fo:language="fr" fo:country="FR" officeooo:rsid="006de6d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211" style:family="text">
      <style:text-properties fo:font-family="'Courier New'" style:font-family-generic="modern" style:font-pitch="fixed" fo:font-size="10pt" fo:language="fr" fo:country="FR" officeooo:rsid="0044c9e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212" style:family="text">
      <style:text-properties fo:font-size="10pt" officeooo:rsid="0044c9eb" style:font-size-asian="10pt" style:font-size-complex="10pt"/>
    </style:style>
    <style:style style:name="T213" style:family="text">
      <style:text-properties fo:font-size="10pt" officeooo:rsid="0044a78d" style:font-size-asian="10pt" style:font-size-complex="10pt"/>
    </style:style>
    <style:style style:name="T214" style:family="text">
      <style:text-properties fo:font-size="10pt" officeooo:rsid="004664d2" style:font-size-asian="10pt" style:font-size-complex="10pt"/>
    </style:style>
    <style:style style:name="T215" style:family="text">
      <style:text-properties fo:font-size="10pt" officeooo:rsid="007731fa" style:font-size-asian="10pt" style:font-size-complex="10pt"/>
    </style:style>
    <style:style style:name="T216" style:family="text">
      <style:text-properties fo:font-size="10pt" officeooo:rsid="007588b3" style:font-size-asian="10pt" style:font-size-complex="10pt"/>
    </style:style>
    <style:style style:name="T217" style:family="text">
      <style:text-properties officeooo:rsid="007731fa"/>
    </style:style>
    <style:style style:name="T218" style:family="text">
      <style:text-properties officeooo:rsid="004308bb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officeooo:rsid="0041227a"/>
    </style:style>
    <style:style style:name="T221" style:family="text">
      <style:text-properties fo:font-weight="bold" officeooo:rsid="0041227a" style:font-weight-asian="bold" style:font-weight-complex="bold"/>
    </style:style>
    <style:style style:name="T222" style:family="text">
      <style:text-properties officeooo:rsid="007a66d8"/>
    </style:style>
    <style:style style:name="T223" style:family="text">
      <style:text-properties fo:color="#404040" loext:opacity="100%" fo:font-size="1pt" fo:font-weight="bold" style:font-size-asian="1pt" style:font-weight-asian="bold" style:font-name-complex="Calibri1" style:font-size-complex="1pt">
        <loext:char-complex-color loext:theme-type="dark1" loext:color-type="theme">
          <loext:transformation loext:type="tint" loext:value="2509"/>
        </loext:char-complex-color>
      </style:text-properties>
    </style:style>
    <style:style style:name="T224" style:family="text"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/>
    </style:style>
    <style:style style:name="T225" style:family="text">
      <style:text-properties fo:color="#404040" loext:opacity="100%" fo:font-weight="bold" officeooo:rsid="00481ddd" style:font-weight-asian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226" style:family="text">
      <style:text-properties officeooo:rsid="00481ddd"/>
    </style:style>
    <style:style style:name="T227" style:family="text">
      <style:text-properties fo:color="#404040" loext:opacity="100%" fo:font-size="4pt" fo:font-weight="bold" style:font-size-asian="4pt" style:font-weight-asian="bold" style:font-name-complex="Calibri1" style:font-size-complex="4pt">
        <loext:char-complex-color loext:theme-type="dark1" loext:color-type="theme">
          <loext:transformation loext:type="tint" loext:value="2509"/>
        </loext:char-complex-color>
      </style:text-properties>
    </style:style>
    <style:style style:name="T228" style:family="text">
      <style:text-properties fo:color="#404040" loext:opacity="100%" style:font-name="Wingdings 3" fo:font-size="6pt" fo:font-weight="bold" style:font-size-asian="6pt" style:language-asian="fr" style:country-asian="FR" style:font-weight-asian="bold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229" style:family="text">
      <style:text-properties fo:color="#404040" loext:opacity="100%" fo:font-style="italic" style:font-style-asian="italic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officeooo:rsid="007ad18e"/>
    </style:style>
    <style:style style:name="T232" style:family="text">
      <style:text-properties officeooo:rsid="007b5cec"/>
    </style:style>
    <style:style style:name="T233" style:family="text">
      <style:text-properties fo:color="#404040" loext:opacity="100%" fo:font-weight="bold" style:font-weight-asian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234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35" style:family="text">
      <style:text-properties fo:color="#404040" loext:opacity="100%" fo:font-size="14pt" fo:font-style="italic" style:font-size-asian="14pt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36" style:family="text">
      <style:text-properties fo:font-size="14pt" fo:font-style="italic" style:font-size-asian="14pt" style:font-style-asian="italic" style:font-name-complex="Calibri1" style:font-size-complex="14pt"/>
    </style:style>
    <style:style style:name="T237" style:family="text">
      <style:text-properties fo:color="#404040" loext:opacity="100%" fo:font-size="14pt" style:font-size-asian="14pt" style:language-asian="fr" style:country-asian="FR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38" style:family="text">
      <style:text-properties fo:color="#404040" loext:opacity="100%" fo:font-size="12pt" fo:font-style="italic" style:font-size-asian="12pt" style:font-style-asian="italic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39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40" style:family="text">
      <style:text-properties fo:font-size="12pt" style:font-size-asian="12pt" style:font-name-complex="Calibri1" style:font-size-complex="12pt"/>
    </style:style>
    <style:style style:name="T241" style:family="text">
      <style:text-properties fo:color="#404040" loext:opacity="100%" fo:font-size="12pt" fo:font-style="italic" officeooo:rsid="0011837b" style:font-size-asian="12pt" style:font-style-asian="italic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42" style:family="text">
      <style:text-properties officeooo:rsid="0011837b"/>
    </style:style>
    <style:style style:name="T243" style:family="text">
      <style:text-properties fo:font-size="18pt"/>
    </style:style>
    <style:style style:name="T244" style:family="text">
      <style:text-properties fo:color="#404040" loext:opacity="100%" fo:font-family="'Brush Script MT'" style:font-pitch="variable" fo:font-size="12pt" officeooo:rsid="001379c9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45" style:family="text">
      <style:text-properties fo:font-variant="small-caps" fo:font-size="20pt" fo:font-weight="bold" style:font-size-asian="20pt" style:font-weight-asian="bold" style:font-name-complex="Calibri1" style:font-size-complex="20pt"/>
    </style:style>
    <style:style style:name="T246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47" style:family="text">
      <style:text-properties fo:font-size="14pt" fo:font-style="italic" style:font-size-asian="14pt" style:language-asian="fr" style:country-asian="FR" style:font-style-asian="italic" style:font-name-complex="Calibri1" style:font-size-complex="14pt"/>
    </style:style>
    <style:style style:name="T248" style:family="text">
      <style:text-properties fo:color="#404040" loext:opacity="100%" fo:font-family="Cambria" style:font-family-generic="roman" style:font-pitch="variable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style:writing-mode="lr-tb" loext:decorative="false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>
        <loext:stroke-complex-color loext:theme-type="light1" loext:color-type="theme">
          <loext:transformation loext:type="lummod" loext:value="8500"/>
        </loext:stroke-complex-color>
      </style:graphic-properties>
      <style:paragraph-properties style:writing-mode="lr-tb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18cm" fo:min-width="7.722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d9d9d9" draw:fill="none" loext:fill-use-slide-background="false" draw:textarea-vertical-align="middle" draw:auto-grow-height="false" fo:min-height="5.757cm" fo:min-width="5.576cm" fo:padding-top="0.127cm" fo:padding-bottom="0.127cm" fo:padding-left="0.254cm" fo:padding-right="0.254cm" fo:wrap-option="wrap" style:writing-mode="lr-tb" loext:decorative="false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 loext:rel-height-rel="page">
        <loext:stroke-complex-color loext:theme-type="light1" loext:color-type="theme">
          <loext:transformation loext:type="lummod" loext:value="8500"/>
        </loext:stroke-complex-color>
      </style:graphic-properties>
      <style:paragraph-properties style:writing-mode="lr-tb"/>
    </style:style>
    <style:style style:name="gr4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12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7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12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>
        <loext:stroke-complex-color loext:theme-type="light1" loext:color-type="theme">
          <loext:transformation loext:type="lummod" loext:value="8500"/>
        </loext:stroke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 loext:marker-style-name="T2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1">
          <table:table-cell table:style-name="Table1.A2" office:value-type="string">
            <text:p text:style-name="P4" loext:marker-style-name="T4"><text:span text:style-name="T2">Nom de naissance</text:span><text:span text:style-name="T5"/></text:p>
          </table:table-cell>
          <table:table-cell table:style-name="Table1.B2" office:value-type="string">
            <text:p text:style-name="P5" loext:marker-style-name="T6"><text:span text:style-name="T6"></text:span><text:span text:style-name="T6"/></text:p>
          </table:table-cell>
          <table:table-cell table:style-name="Table1.A1" office:value-type="string">
            <text:p text:style-name="P4" loext:marker-style-name="T3"><loext:content-control loext:plain-text="true" loext:alias="Nom naissance" loext:tag="Nom naissance" loext:id="423775582"><text:span text:style-name="Placeholder_20_Text"><text:span text:style-name="T7">BOUCHUT</text:span></text:span></loext:content-control></text:p>
          </table:table-cell>
        </table:table-row>
        <table:table-row table:style-name="Table1.1">
          <table:table-cell table:style-name="Table1.A2" office:value-type="string">
            <text:p text:style-name="P4" loext:marker-style-name="T4"><text:span text:style-name="T2">Nom d’usage</text:span><text:span text:style-name="T5"/></text:p>
          </table:table-cell>
          <table:table-cell table:style-name="Table1.B2" office:value-type="string">
            <text:p text:style-name="P5" loext:marker-style-name="T8"><text:span text:style-name="T6"></text:span><text:span text:style-name="T9"/></text:p>
          </table:table-cell>
          <table:table-cell table:style-name="Table1.A1" office:value-type="string">
            <text:p text:style-name="P4" loext:marker-style-name="T3"><loext:content-control loext:plain-text="true" loext:alias="Nom d'usage" loext:tag="Nom d'usage" loext:id="466088377"/></text:p>
          </table:table-cell>
        </table:table-row>
        <table:table-row table:style-name="Table1.1">
          <table:table-cell table:style-name="Table1.A2" office:value-type="string">
            <text:p text:style-name="P4" loext:marker-style-name="T4"><text:span text:style-name="T2">Prénom</text:span><text:span text:style-name="T5"/></text:p>
          </table:table-cell>
          <table:table-cell table:style-name="Table1.B2" office:value-type="string">
            <text:p text:style-name="P5" loext:marker-style-name="T8"><text:span text:style-name="T6"></text:span><text:span text:style-name="T9"/></text:p>
          </table:table-cell>
          <table:table-cell table:style-name="Table1.A1" office:value-type="string">
            <text:p text:style-name="P4" loext:marker-style-name="T3"><loext:content-control loext:plain-text="true" loext:alias="Prénom" loext:tag="Prénom" loext:id="966778718"><text:span text:style-name="Placeholder_20_Text"><text:span text:style-name="T7">Eric</text:span></text:span></loext:content-control></text:p>
          </table:table-cell>
        </table:table-row>
        <table:table-row table:style-name="Table1.1">
          <table:table-cell table:style-name="Table1.A2" office:value-type="string">
            <text:p text:style-name="P4" loext:marker-style-name="T4"><text:span text:style-name="T2">Adresse</text:span><text:span text:style-name="T5"/></text:p>
          </table:table-cell>
          <table:table-cell table:style-name="Table1.B2" office:value-type="string">
            <text:p text:style-name="P5" loext:marker-style-name="T8"><text:span text:style-name="T6"></text:span><text:span text:style-name="T9"/></text:p>
          </table:table-cell>
          <table:table-cell table:style-name="Table1.A1" table:number-rows-spanned="2" office:value-type="string">
            <text:p text:style-name="P4" loext:marker-style-name="T3"><loext:content-control loext:plain-text="true" loext:alias="Adresse" loext:tag="Adresse" loext:id="-1351406819"><text:span text:style-name="Placeholder_20_Text"><text:span text:style-name="T7">12 Allée Pascal Guilhen, RDC, 13127 Vitrolles</text:span></text:span></loext:content-control></text:p>
          </table:table-cell>
        </table:table-row>
        <table:table-row table:style-name="Table1.1">
          <table:table-cell table:style-name="Table1.A2" office:value-type="string">
            <text:p text:style-name="P2" loext:marker-style-name="T2"/>
          </table:table-cell>
          <table:table-cell table:style-name="Table1.B2" office:value-type="string">
            <text:p text:style-name="P6" loext:marker-style-name="T6"/>
          </table:table-cell>
          <table:covered-table-cell table:style-name="Table1.A1"/>
        </table:table-row>
      </table:table>
      <text:p text:style-name="P1" loext:marker-style-name="T1"/>
      <text:p text:style-name="P1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" loext:marker-style-name="T10"><text:span text:style-name="T11">Titre professionnel visé</text:span><text:span text:style-name="T11"/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8" loext:marker-style-name="T12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9" loext:marker-style-name="T13"><loext:content-control loext:plain-text="true" loext:alias="Titre pro" loext:tag="Titre pro" loext:id="-837616293"><text:span text:style-name="Placeholder_20_Text"><text:span text:style-name="T14">Développeur Web et Web Mobile</text:span></text:span></loext:content-control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3" loext:marker-style-name="T3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10" loext:marker-style-name="T15"><text:span text:style-name="T16">Modalité d’accès :</text:span><text:span text:style-name="T16"/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11" loext:marker-style-name="T1"/>
          </table:table-cell>
          <table:covered-table-cell/>
        </table:table-row>
        <table:table-row table:style-name="Table2.1">
          <table:table-cell table:style-name="Table2.A7" office:value-type="string">
            <text:p text:style-name="P12" loext:marker-style-name="T3"><text:span text:style-name="T17">☒</text:span><text:span text:style-name="T17"/></text:p>
          </table:table-cell>
          <table:table-cell table:style-name="Table2.B7" office:value-type="string">
            <text:p text:style-name="P10" loext:marker-style-name="T13"><text:span text:style-name="T18">Parcours de formation</text:span><text:span text:style-name="T19"/></text:p>
          </table:table-cell>
        </table:table-row>
        <table:table-row table:style-name="Table2.1">
          <table:table-cell table:style-name="Table2.A7" office:value-type="string">
            <text:p text:style-name="P12" loext:marker-style-name="T3"><text:span text:style-name="T17">☐</text:span><text:span text:style-name="T17"/></text:p>
          </table:table-cell>
          <table:table-cell table:style-name="Table2.B8" office:value-type="string">
            <text:p text:style-name="P10" loext:marker-style-name="T20"><text:span text:style-name="T18">Validation des Acquis de l’Expérience (VAE)</text:span><text:span text:style-name="T18"/></text:p>
          </table:table-cell>
        </table:table-row>
        <table:table-row table:style-name="Table2.9">
          <table:table-cell table:style-name="Table2.A9" table:number-columns-spanned="2" office:value-type="string">
            <text:p text:style-name="P13" loext:marker-style-name="T21"/>
          </table:table-cell>
          <table:covered-table-cell/>
        </table:table-row>
      </table:table>
      <text:p text:style-name="P1" loext:marker-style-name="T1"/>
      <text:p text:style-name="P1" loext:marker-style-name="T1"/>
      <text:p text:style-name="P1" loext:marker-style-name="T1"/>
      <text:p text:style-name="P14" loext:marker-style-name="T1"><text:span text:style-name="T22"><text:s/></text:span><text:span text:style-name="T2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7" loext:marker-style-name="T24"><text:span text:style-name="T11">Présentation du dossier</text:span><text:span text:style-name="T25"/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4" office:value-type="string">
            <text:p text:style-name="P8" loext:marker-style-name="T12"/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3" table:number-columns-spanned="4" office:value-type="string">
            <text:p text:style-name="P3" loext:marker-style-name="T3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15" loext:marker-style-name="T26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16" loext:marker-style-name="T27"><text:span text:style-name="T28"/></text:p>
          </table:table-cell>
          <table:table-cell table:style-name="Table5.B5" table:number-columns-spanned="2" office:value-type="string">
            <text:p text:style-name="P17" loext:marker-style-name="T27"><text:span text:style-name="T27">Le dossier professionnel (DP) constitue un élément du système de validation du titre professionnel. </text:span><text:span text:style-name="T29">Ce titre est délivré par le Ministère chargé de l’emploi.</text:span></text:p>
            <text:p text:style-name="P17" loext:marker-style-name="T27"><text:span text:style-name="T27">Le DP appartient au candidat. Il le conserve, l’actualise durant son parcours et le présente </text:span><text:span text:style-name="T29">obligatoirement à chaque session d’examen</text:span><text:span text:style-name="T27">.</text:span></text:p>
            <text:p text:style-name="P18" loext:marker-style-name="T27"><text:span text:style-name="T28">Pour rédiger le DP, le candidat peut être aidé par un formateur ou par un accompagnateur VAE.</text:span></text:p>
            <text:p text:style-name="P16" loext:marker-style-name="T27"><text:span text:style-name="T28">Il est consulté par le jury au moment de la session d’examen.</text:span><text:span text:style-name="T28"/></text:p>
          </table:table-cell>
          <table:covered-table-cell/>
          <table:table-cell table:style-name="Table5.D5" office:value-type="string">
            <text:p text:style-name="P19" loext:marker-style-name="T27"/>
          </table:table-cell>
        </table:table-row>
        <table:table-row table:style-name="Table5.1">
          <table:table-cell table:style-name="Table5.A6" table:number-columns-spanned="4" office:value-type="string">
            <text:p text:style-name="P20" loext:marker-style-name="T21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7" table:number-columns-spanned="4" office:value-type="string">
            <text:p text:style-name="P10" loext:marker-style-name="T1"><text:span text:style-name="T23">Pour prendre sa décision, le jury dispose :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4" office:value-type="string">
            <text:list text:style-name="WWNum7">
              <text:list-item>
                <text:p text:style-name="P21" loext:marker-style-name="T21"><text:span text:style-name="T30">des résultats de la mise en situation professionnelle complétés, éventuellement, du questionnaire professionnel ou de l’entretien professionnel ou de l’entretien technique ou du questionnement à partir de productions.</text:span><text:span text:style-name="T30"/></text:p>
              </text:list-item>
              <text:list-item>
                <text:p text:style-name="P22" loext:marker-style-name="T21"><text:span text:style-name="T21">du </text:span><text:span text:style-name="T31">Dossier Professionnel</text:span><text:span text:style-name="T21"> (DP) dans lequel le candidat a consigné les preuves de sa pratique professionnelle</text:span></text:p>
              </text:list-item>
              <text:list-item>
                <text:p text:style-name="P21" loext:marker-style-name="T21"><text:span text:style-name="T30">des résultats des évaluations passées en cours de formation lorsque le candidat évalué est issu d’un parcours de formation</text:span><text:span text:style-name="T30"/></text:p>
              </text:list-item>
              <text:list-item>
                <text:p text:style-name="P21" loext:marker-style-name="T21"><text:span text:style-name="T30">de l’entretien final (dans le cadre de la session titre).</text:span><text:span text:style-name="T30"/></text:p>
              </text:list-item>
            </text:list>
            <text:p text:style-name="P23" loext:marker-style-name="T21"/>
            <text:p text:style-name="P24" loext:marker-style-name="T32"><text:span text:style-name="T33"><text:tab/></text:span><text:span text:style-name="T34"><text:tab/></text:span><text:span text:style-name="T32">[Arrêté du 22 décembre 2015, relatif aux conditions de délivrance des titres professionnels</text:span></text:p>
            <text:p text:style-name="P25" loext:marker-style-name="T32"><text:span text:style-name="T35">du ministère chargé de l’Emploi]</text:span><text:span text:style-name="T35"/></text:p>
            <text:p text:style-name="P26" loext:marker-style-name="T1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9" table:number-columns-spanned="4" office:value-type="string">
            <text:p text:style-name="P10" loext:marker-style-name="T1"><text:span text:style-name="T23">Ce dossier comporte :</text:span><text:span text:style-name="T23"/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0" table:number-columns-spanned="4" office:value-type="string">
            <text:list text:style-name="WWNum5">
              <text:list-item>
                <text:p text:style-name="P27" loext:marker-style-name="T21"><text:span text:style-name="T30">pour chaque activité-type du titre visé, un à trois exemples de pratique professionnelle ;</text:span></text:p>
              </text:list-item>
              <text:list-item>
                <text:p text:style-name="P27" loext:marker-style-name="T21"><text:span text:style-name="T30">un tableau à renseigner si le candidat souhaite porter à la connaissance du jury la détention d’un titre, d’un diplôme, d’un certificat de qualification professionnelle (CQP) ou des attestations de formation ;</text:span><text:span text:style-name="T30"/></text:p>
              </text:list-item>
              <text:list-item>
                <text:p text:style-name="P27" loext:marker-style-name="T21"><text:span text:style-name="T30">une déclaration sur l’honneur à compléter et à signer ;</text:span><text:span text:style-name="T30"/></text:p>
              </text:list-item>
              <text:list-item>
                <text:p text:style-name="P27" loext:marker-style-name="T21"><text:span text:style-name="T30">des documents illustrant la pratique professionnelle du candidat (facultatif)</text:span><text:span text:style-name="T30"/></text:p>
              </text:list-item>
              <text:list-item>
                <text:p text:style-name="P27" loext:marker-style-name="T21"><text:span text:style-name="T30">des annexes, si nécessaire.</text:span><text:span text:style-name="T30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5.11">
          <table:table-cell table:style-name="Table5.A11" table:number-columns-spanned="4" office:value-type="string">
            <text:p text:style-name="P28" loext:marker-style-name="T1"><text:span text:style-name="T36">Pour compléter ce dossier, le candidat dispose d’un site web en accès libre sur le site.</text:span><text:span text:style-name="T37"/></text:p>
          </table:table-cell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29" loext:marker-style-name="T38"><text:span text:style-name="T39"></text:span><text:span text:style-name="T38"/></text:p>
          </table:table-cell>
          <table:covered-table-cell/>
          <table:table-cell table:style-name="Table5.C12" table:number-columns-spanned="2" office:value-type="string">
            <text:p text:style-name="P30" loext:marker-style-name="T1"><text:a xlink:type="simple" xlink:href="http://travail-emploi.gouv.fr/titres-professionnels" text:style-name="Internet_20_link" text:visited-style-name="Visited_20_Internet_20_Link"><text:span text:style-name="Internet_20_link"><text:span text:style-name="T23">http://travail-emploi.gouv.fr/titres-professionnels</text:span></text:span></text:a></text:p>
          </table:table-cell>
          <table:covered-table-cell/>
        </table:table-row>
      </table:table>
      <text:p text:style-name="P31" loext:marker-style-name="T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4" loext:marker-style-name="T40"><text:span text:style-name="T41">Sommaire</text:span><text:span text:style-name="T40"/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4" office:value-type="string">
            <text:p text:style-name="P26" loext:marker-style-name="T1"/>
            <text:p text:style-name="P10" loext:marker-style-name="T1"><text:span text:style-name="T23">Exemples de pratique professionnelle</text:span><text:span text:style-name="T23"/></text:p>
            <text:p text:style-name="P26" loext:marker-style-name="T1"/>
          </table:table-cell>
          <table:covered-table-cell/>
          <table:covered-table-cell/>
          <table:covered-table-cell/>
        </table:table-row>
        <table:table-row table:style-name="Table6.3">
          <table:table-cell table:style-name="Table6.A3" table:number-columns-spanned="2" office:value-type="string">
            <text:p text:style-name="P16" loext:marker-style-name="T42"><text:span text:style-name="T43">Développer la partie front-end d’une application web ou web mobile sécurisée</text:span><text:span text:style-name="T44"/></text:p>
          </table:table-cell>
          <table:covered-table-cell/>
          <table:table-cell table:style-name="Table6.C3" office:value-type="string">
            <text:p text:style-name="P32" loext:marker-style-name="T3"><text:span text:style-name="T43">p.</text:span><text:span text:style-name="T44"/></text:p>
          </table:table-cell>
          <table:table-cell table:style-name="Table6.C3" office:value-type="string">
            <text:p text:style-name="P10" loext:marker-style-name="T45"><text:span text:style-name="T43"><text:bookmark-ref text:reference-format="page" text:ref-name="1 Développer la partie front-end d’une application web ou web mobile sécurisée">5</text:bookmark-ref></text:span></text:p>
          </table:table-cell>
        </table:table-row>
        <table:table-row table:style-name="Table6.1">
          <table:table-cell table:style-name="Table6.A4" office:value-type="string">
            <text:p text:style-name="P3" loext:marker-style-name="T3"/>
          </table:table-cell>
          <table:table-cell table:style-name="Table6.B4" office:value-type="string">
            <text:p text:style-name="P33" loext:marker-style-name="T27"><text:span text:style-name="T6"></text:span><text:span text:style-name="T27"> Installer et configurer son environnement de travail en fonction du projet </text:span><text:span text:style-name="T46">W</text:span><text:span text:style-name="T27">eb ou </text:span><text:span text:style-name="T46">W</text:span><text:span text:style-name="T27">eb mobile</text:span></text:p>
          </table:table-cell>
          <table:table-cell table:style-name="Table6.C4" office:value-type="string">
            <text:p text:style-name="P34" loext:marker-style-name="T27"><text:span text:style-name="T28">p.</text:span></text:p>
          </table:table-cell>
          <table:table-cell table:style-name="Table6.D4" office:value-type="string">
            <text:p text:style-name="P35"><text:bookmark-ref text:reference-format="page" text:ref-name="1.1 Installer et configurer son environnement de travail en fonction du projet web ou web mobile">5</text:bookmark-ref></text:p>
          </table:table-cell>
        </table:table-row>
        <table:table-row table:style-name="Table6.1">
          <table:table-cell table:style-name="Table6.A5" office:value-type="string">
            <text:p text:style-name="P3" loext:marker-style-name="T3"/>
          </table:table-cell>
          <table:table-cell table:style-name="Table6.B5" office:value-type="string">
            <text:p text:style-name="P33" loext:marker-style-name="T27"><text:span text:style-name="T6"></text:span><text:span text:style-name="T27"> Maquetter des interfaces utilisateur </text:span><text:span text:style-name="T46">W</text:span><text:span text:style-name="T27">eb ou </text:span><text:span text:style-name="T46">W</text:span><text:span text:style-name="T27">eb mobile</text:span></text:p>
          </table:table-cell>
          <table:table-cell table:style-name="Table6.C5" office:value-type="string">
            <text:p text:style-name="P34" loext:marker-style-name="T27"><text:span text:style-name="T28">p.</text:span><text:span text:style-name="T28"/></text:p>
          </table:table-cell>
          <table:table-cell table:style-name="Table6.D5" office:value-type="string">
            <text:p text:style-name="P36" loext:marker-style-name="T27"><text:bookmark-ref text:reference-format="page" text:ref-name="1.2 Maquetter des interfaces utilisateur web ou web mobile">9</text:bookmark-ref></text:p>
          </table:table-cell>
        </table:table-row>
        <table:table-row table:style-name="Table6.1">
          <table:table-cell table:style-name="Table6.A6" office:value-type="string">
            <text:p text:style-name="P3" loext:marker-style-name="T3"/>
          </table:table-cell>
          <table:table-cell table:style-name="Table6.B6" office:value-type="string">
            <text:p text:style-name="P33" loext:marker-style-name="T27"><text:span text:style-name="T6"></text:span><text:span text:style-name="T27"> Réaliser des interfaces utilisateur statiques </text:span><text:span text:style-name="T46">W</text:span><text:span text:style-name="T27">eb ou </text:span><text:span text:style-name="T46">W</text:span><text:span text:style-name="T27">eb mobile</text:span></text:p>
          </table:table-cell>
          <table:table-cell table:style-name="Table6.C6" office:value-type="string">
            <text:p text:style-name="P34" loext:marker-style-name="T27"><text:span text:style-name="T28">p.</text:span><text:span text:style-name="T28"/></text:p>
          </table:table-cell>
          <table:table-cell table:style-name="Table6.D6" office:value-type="string">
            <text:p text:style-name="P36" loext:marker-style-name="T27"><text:bookmark-ref text:reference-format="page" text:ref-name="1.3 Réaliser des interfaces utilisateur statiques Web ou Web mobile">11</text:bookmark-ref></text:p>
          </table:table-cell>
        </table:table-row>
        <table:table-row table:style-name="Table6.1">
          <table:table-cell table:style-name="Table6.A7" office:value-type="string">
            <text:p text:style-name="P3" loext:marker-style-name="T3"/>
          </table:table-cell>
          <table:table-cell table:style-name="Table6.B7" office:value-type="string">
            <text:p text:style-name="P33" loext:marker-style-name="T6"><text:span text:style-name="T6"></text:span><text:span text:style-name="T27"> Développer la partie dynamique des interfaces utilisateur </text:span><text:span text:style-name="T46">W</text:span><text:span text:style-name="T27">eb ou </text:span><text:span text:style-name="T46">W</text:span><text:span text:style-name="T27">eb mobile</text:span></text:p>
          </table:table-cell>
          <table:table-cell table:style-name="Table6.C7" office:value-type="string">
            <text:p text:style-name="P34" loext:marker-style-name="T27"><text:span text:style-name="T28">p.</text:span></text:p>
          </table:table-cell>
          <table:table-cell table:style-name="Table6.D7" office:value-type="string">
            <text:p text:style-name="P36" loext:marker-style-name="T27"><text:bookmark-ref text:reference-format="page" text:ref-name="1.4 Développer la partie dynamique des interfaces utilisateur Web ou Web mobile">14</text:bookmark-ref></text:p>
          </table:table-cell>
        </table:table-row>
        <table:table-row table:style-name="Table6.8">
          <table:table-cell table:style-name="Table6.A8" office:value-type="string">
            <text:p text:style-name="P37" loext:marker-style-name="T47"/>
          </table:table-cell>
          <table:table-cell table:style-name="Table6.B8" office:value-type="string">
            <text:p text:style-name="P38" loext:marker-style-name="T48"/>
          </table:table-cell>
          <table:table-cell table:style-name="Table6.C8" office:value-type="string">
            <text:p text:style-name="P39" loext:marker-style-name="T48"/>
          </table:table-cell>
          <table:table-cell table:style-name="Table6.D8" office:value-type="string">
            <text:p text:style-name="P40" loext:marker-style-name="T8"/>
          </table:table-cell>
        </table:table-row>
        <table:table-row table:style-name="Table6.1">
          <table:table-cell table:style-name="Table6.A3" table:number-columns-spanned="2" office:value-type="string">
            <text:p text:style-name="P16" loext:marker-style-name="T42"><text:span text:style-name="T43">Développer la partie back-end d’une application web ou web mobile sécurisée</text:span><text:span text:style-name="T44"/></text:p>
          </table:table-cell>
          <table:covered-table-cell/>
          <table:table-cell table:style-name="Table6.C3" office:value-type="string">
            <text:p text:style-name="P32" loext:marker-style-name="T3"><text:span text:style-name="T43">p.</text:span><text:span text:style-name="T44"/></text:p>
          </table:table-cell>
          <table:table-cell table:style-name="Table6.C3" office:value-type="string">
            <text:p text:style-name="P41" loext:marker-style-name="T45"><text:bookmark-ref text:reference-format="page" text:ref-name="2 Développer la partie back-end d’une application web ou web mobile sécurisée">16</text:bookmark-ref></text:p>
          </table:table-cell>
        </table:table-row>
        <table:table-row table:style-name="Table6.1">
          <table:table-cell table:style-name="Table6.A10" office:value-type="string">
            <text:p text:style-name="P3" loext:marker-style-name="T3"/>
          </table:table-cell>
          <table:table-cell table:style-name="Table6.B10" office:value-type="string">
            <text:p text:style-name="P33" loext:marker-style-name="T27"><text:span text:style-name="T6"></text:span><text:span text:style-name="T27"> Mettre en place une base de données relationnell</text:span><text:span text:style-name="T49">e</text:span></text:p>
          </table:table-cell>
          <table:table-cell table:style-name="Table6.C10" office:value-type="string">
            <text:p text:style-name="P34" loext:marker-style-name="T27"><text:span text:style-name="T28">p.</text:span><text:span text:style-name="T28"/></text:p>
          </table:table-cell>
          <table:table-cell table:style-name="Table6.D10" office:value-type="string">
            <text:p text:style-name="P36" loext:marker-style-name="T27"><text:bookmark-ref text:reference-format="page" text:ref-name="2.5 Mettre en place une base de données relationnell">16</text:bookmark-ref></text:p>
          </table:table-cell>
        </table:table-row>
        <table:table-row table:style-name="Table6.1">
          <table:table-cell table:style-name="Table6.A11" office:value-type="string">
            <text:p text:style-name="P3" loext:marker-style-name="T3"/>
          </table:table-cell>
          <table:table-cell table:style-name="Table6.B11" office:value-type="string">
            <text:p text:style-name="P33" loext:marker-style-name="T27"><text:span text:style-name="T6"></text:span><text:span text:style-name="T27"> Développer des composants d’accès aux données SQL et NoSQL</text:span></text:p>
          </table:table-cell>
          <table:table-cell table:style-name="Table6.C11" office:value-type="string">
            <text:p text:style-name="P34" loext:marker-style-name="T27"><text:span text:style-name="T28">p.</text:span><text:span text:style-name="T28"/></text:p>
          </table:table-cell>
          <table:table-cell table:style-name="Table6.D11" office:value-type="string">
            <text:p text:style-name="P36" loext:marker-style-name="T27"><text:bookmark-ref text:reference-format="page" text:ref-name="2.6 Développer des composants d’accès aux données SQL et NoSQL">18</text:bookmark-ref></text:p>
          </table:table-cell>
        </table:table-row>
        <table:table-row table:style-name="Table6.1">
          <table:table-cell table:style-name="Table6.A12" office:value-type="string">
            <text:p text:style-name="P3" loext:marker-style-name="T3"/>
          </table:table-cell>
          <table:table-cell table:style-name="Table6.B12" office:value-type="string">
            <text:p text:style-name="P33" loext:marker-style-name="T6"><text:span text:style-name="T6"></text:span><text:span text:style-name="T27"> Développer des composants métier coté serveur</text:span></text:p>
          </table:table-cell>
          <table:table-cell table:style-name="Table6.C12" office:value-type="string">
            <text:p text:style-name="P34" loext:marker-style-name="T27"><text:span text:style-name="T28">p.</text:span><text:span text:style-name="T28"/></text:p>
          </table:table-cell>
          <table:table-cell table:style-name="Table6.D12" office:value-type="string">
            <text:p text:style-name="P36" loext:marker-style-name="T27"><text:bookmark-ref text:reference-format="page" text:ref-name="2.7 Développer des composants métier coté serveur">20</text:bookmark-ref></text:p>
          </table:table-cell>
        </table:table-row>
        <table:table-row table:style-name="Table6.1">
          <table:table-cell table:style-name="Table6.A13" office:value-type="string">
            <text:p text:style-name="P3" loext:marker-style-name="T3"/>
          </table:table-cell>
          <table:table-cell table:style-name="Table6.B13" office:value-type="string">
            <text:p text:style-name="P33" loext:marker-style-name="T27"><text:span text:style-name="T6"></text:span><text:span text:style-name="T27"> Documenter le déploiement d’une application dynamique </text:span><text:span text:style-name="T46">W</text:span><text:span text:style-name="T27">eb ou </text:span><text:span text:style-name="T46">W</text:span><text:span text:style-name="T27">eb mobile</text:span></text:p>
          </table:table-cell>
          <table:table-cell table:style-name="Table6.C13" office:value-type="string">
            <text:p text:style-name="P34" loext:marker-style-name="T27"><text:span text:style-name="T28">p.</text:span><text:span text:style-name="T28"/></text:p>
          </table:table-cell>
          <table:table-cell table:style-name="Table6.D13" office:value-type="string">
            <text:p text:style-name="P36" loext:marker-style-name="T27"><text:bookmark-ref text:reference-format="page" text:ref-name="2.8 Documenter le déploiement d’une application dynamique web ou web mobile">24</text:bookmark-ref></text:p>
          </table:table-cell>
        </table:table-row>
        <table:table-row table:style-name="Table6.1">
          <table:table-cell table:style-name="Table6.A14" office:value-type="string">
            <text:p text:style-name="P42" loext:marker-style-name="T48"/>
          </table:table-cell>
          <table:table-cell table:style-name="Table6.B14" office:value-type="string">
            <text:p text:style-name="P42" loext:marker-style-name="T48"/>
          </table:table-cell>
          <table:table-cell table:style-name="Table6.C14" office:value-type="string">
            <text:p text:style-name="P43" loext:marker-style-name="T48"/>
          </table:table-cell>
          <table:table-cell table:style-name="Table6.D14" office:value-type="string">
            <text:p text:style-name="P42" loext:marker-style-name="T48"/>
          </table:table-cell>
        </table:table-row>
        <table:table-row table:style-name="Table6.1">
          <table:table-cell table:style-name="Table6.A15" table:number-columns-spanned="2" office:value-type="string">
            <text:p text:style-name="P44" loext:marker-style-name="T50"><text:span text:style-name="T45">Titres, diplômes, CQP, attestations de formation </text:span><text:span text:style-name="T33">(facultatif)</text:span></text:p>
          </table:table-cell>
          <table:covered-table-cell/>
          <table:table-cell table:style-name="Table6.C15" office:value-type="string">
            <text:p text:style-name="P34" loext:marker-style-name="T27"><text:span text:style-name="T28">p.</text:span><text:span text:style-name="T28"/></text:p>
          </table:table-cell>
          <table:table-cell table:style-name="Table6.D15" office:value-type="string">
            <text:p text:style-name="P36" loext:marker-style-name="T27"><text:bookmark-ref text:reference-format="page" text:ref-name="Titres diplomes CQP attestations de formation">27</text:bookmark-ref></text:p>
          </table:table-cell>
        </table:table-row>
        <table:table-row table:style-name="Table6.1">
          <table:table-cell table:style-name="Table6.A16" table:number-columns-spanned="2" office:value-type="string">
            <text:p text:style-name="P45" loext:marker-style-name="T50"><text:span text:style-name="T43">Déclaration sur l’honneur</text:span><text:span text:style-name="T43"/></text:p>
          </table:table-cell>
          <table:covered-table-cell/>
          <table:table-cell table:style-name="Table6.C16" office:value-type="string">
            <text:p text:style-name="P34" loext:marker-style-name="T27"><text:span text:style-name="T28">p.</text:span><text:span text:style-name="T28"/></text:p>
          </table:table-cell>
          <table:table-cell table:style-name="Table6.D16" office:value-type="string">
            <text:p text:style-name="P36" loext:marker-style-name="T27"><text:bookmark-ref text:reference-format="page" text:ref-name="Déclaration sur l’honneur">28</text:bookmark-ref></text:p>
          </table:table-cell>
        </table:table-row>
        <table:table-row table:style-name="Table6.1">
          <table:table-cell table:style-name="Table6.A17" table:number-columns-spanned="2" office:value-type="string">
            <text:p text:style-name="P44" loext:marker-style-name="T50"><text:span text:style-name="T45">Documents illustrant la pratique professionnelle </text:span><text:span text:style-name="T33">(facultatif)</text:span></text:p>
          </table:table-cell>
          <table:covered-table-cell/>
          <table:table-cell table:style-name="Table6.C17" office:value-type="string">
            <text:p text:style-name="P34" loext:marker-style-name="T27"><text:span text:style-name="T28">p.</text:span><text:span text:style-name="T28"/></text:p>
          </table:table-cell>
          <table:table-cell table:style-name="Table6.D17" office:value-type="string">
            <text:p text:style-name="P36" loext:marker-style-name="T27"><text:bookmark-ref text:reference-format="page" text:ref-name="Documents illustrant la pratique professionnelle">29</text:bookmark-ref></text:p>
          </table:table-cell>
        </table:table-row>
        <table:table-row table:style-name="Table6.1">
          <table:table-cell table:style-name="Table6.A18" table:number-columns-spanned="2" office:value-type="string">
            <text:p text:style-name="P44" loext:marker-style-name="T50"><text:span text:style-name="T45">Annexes </text:span><text:span text:style-name="T33">(Si le RC le prévoit)</text:span></text:p>
          </table:table-cell>
          <table:covered-table-cell/>
          <table:table-cell table:style-name="Table6.C18" office:value-type="string">
            <text:p text:style-name="P34" loext:marker-style-name="T27"><text:span text:style-name="T28">p.</text:span><text:span text:style-name="T28"/></text:p>
          </table:table-cell>
          <table:table-cell table:style-name="Table6.D18" office:value-type="string">
            <text:p text:style-name="P36" loext:marker-style-name="T27"><text:bookmark-ref text:reference-format="page" text:ref-name="Annexes">30</text:bookmark-ref></text:p>
          </table:table-cell>
        </table:table-row>
      </table:table>
      <text:p text:style-name="P46" loext:marker-style-name="T27"/>
      <text:p text:style-name="P47" loext:marker-style-name="T27"/>
      <text:p text:style-name="P47" loext:marker-style-name="T27"/>
      <text:p text:style-name="P48" loext:marker-style-name="T27"/>
      <text:p text:style-name="P49" loext:marker-style-name="T51"/>
      <text:p text:style-name="P49" loext:marker-style-name="T51"/>
      <text:p text:style-name="P50" loext:marker-style-name="T51"><text:span text:style-name="T52">Exemples de pratique</text:span><text:span text:style-name="T52"/></text:p>
      <text:p text:style-name="P50" loext:marker-style-name="T51"><text:span text:style-name="T52">professionnelle</text:span><text:span text:style-name="T52"/></text:p>
      <text:p text:style-name="P51" loext:marker-style-name="T27"/>
      <text:p text:style-name="P51" loext:marker-style-name="T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B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2" loext:marker-style-name="T27"/>
            <text:p text:style-name="P53" loext:marker-style-name="T53"/>
          </table:table-cell>
          <table:table-cell table:style-name="Table8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8.A1" table:number-columns-spanned="5" office:value-type="string"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">
          <table:table-cell table:style-name="Table8.A1" office:value-type="string">
            <text:p text:style-name="P55" loext:marker-style-name="T53"><text:span text:style-name="T53">Activité-type</text:span></text:p>
          </table:table-cell>
          <table:table-cell table:style-name="Table8.A1" table:number-columns-spanned="3" office:value-type="string">
            <text:p text:style-name="P56" loext:marker-style-name="T53"><text:drop-down text:name=""><text:label text:value="2"/><text:label text:value="3"/><text:label text:value="4"/><text:label text:value="5"/><text:label text:current-selected="true" text:value="1"/>1</text:drop-down></text:p>
          </table:table-cell>
          <table:covered-table-cell/>
          <table:covered-table-cell/>
          <table:table-cell table:style-name="Table8.A1" table:number-columns-spanned="5" office:value-type="string">
            <text:p text:style-name="P4" loext:marker-style-name="T29"><loext:content-control loext:plain-text="true" loext:alias="Intitulé de l'activité" loext:tag="Intitulé de l'activité" loext:id="2113311891"><text:bookmark-start text:name="1 Développer la partie front-end d’une application web ou web mobile sécurisée"/><text:span text:style-name="T45">Développer la partie front-end d’une application web ou web mobile sécurisée</text:span><text:bookmark-end text:name="1 Développer la partie front-end d’une application web ou web mobile sécurisé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3" table:number-columns-spanned="4" office:value-type="string">
            <text:p text:style-name="P57" loext:marker-style-name="T54"><text:span text:style-name="T55">Exemple n°1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8.E3" table:number-columns-spanned="5" office:value-type="string">
            <text:p text:style-name="P4" loext:marker-style-name="T56"><loext:content-control loext:plain-text="true" loext:id="-832212218"><text:bookmark-start text:name="1.1 Installer et configurer son environnement de travail en fonction du projet web ou web mobile"/><text:span text:style-name="T27">Installer et configurer son environnement de travail en fonction du projet web ou web mobile</text:span><text:bookmark-end text:name="1.1 Installer et configurer son environnement de travail en fonction du projet web ou web mobil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8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9" office:value-type="string">
            <text:p text:style-name="P59" loext:marker-style-name="T29"><text:span text:style-name="Placeholder_20_Text"><text:span text:style-name="T58">J</text:span></text:span><text:span text:style-name="T58">’</text:span><text:span text:style-name="T59">utilis</text:span><text:span text:style-name="T60">e </text:span><text:span text:style-name="T61">au quotidien </text:span><text:span text:style-name="T58">les </text:span><text:span text:style-name="T62">Navigateurs Web </text:span><text:a xlink:type="simple" xlink:href="https://www.diabrowser.com/" text:style-name="Internet_20_link" text:visited-style-name="Visited_20_Internet_20_Link"><text:span text:style-name="T63">Dia</text:span></text:a><text:span text:style-name="T58">, </text:span><text:a xlink:type="simple" xlink:href="https://arc.net/" text:style-name="Internet_20_link" text:visited-style-name="Visited_20_Internet_20_Link"><text:span text:style-name="T63">Arc Browser</text:span></text:a><text:span text:style-name="T63">, </text:span><text:span text:style-name="T64">Google </text:span><text:span text:style-name="T63">Chrome</text:span><text:span text:style-name="T65">, </text:span><text:span text:style-name="T66">et </text:span><text:span text:style-name="T67">Firefox</text:span><text:span text:style-name="T58"> </text:span><text:span text:style-name="T68">(</text:span><text:span text:style-name="T59">déjà installés et configurés sur mon ordinateur</text:span><text:span text:style-name="T68">) </text:span><text:span text:style-name="T60">pour </text:span><text:span text:style-name="T69">consulter d</text:span><text:span text:style-name="T59">es sites Web</text:span><text:span text:style-name="T60">.<text:line-break/></text:span><text:span text:style-name="T61">Je m’en sers aussi quand je développe un site Web, pour </text:span><text:span text:style-name="T70">consulter</text:span><text:span text:style-name="T61"> </text:span><text:span text:style-name="T70">(et diagnostiquer les problèmes dans) </text:span><text:span text:style-name="T61">la </text:span><text:span text:style-name="T71">structure et </text:span><text:span text:style-name="T61">le </text:span><text:span text:style-name="T71">rendu </text:span><text:span text:style-name="T61">d’une page </text:span><text:span text:style-name="T70">Web </text:span><text:span text:style-name="T60">à l’aide de </text:span><text:span text:style-name="T59">l’outil </text:span><text:span text:style-name="T60">natif </text:span><text:a xlink:type="simple" xlink:href="https://developer.chrome.com/docs/devtools" text:style-name="Internet_20_link" text:visited-style-name="Visited_20_Internet_20_Link"><text:span text:style-name="T72">DevTools</text:span></text:a><text:span text:style-name="T61">.<text:line-break/><text:line-break/>Celui-ci <text:s/>permet de </text:span><text:span text:style-name="T73">consulter </text:span><text:span text:style-name="T60">et modifier </text:span><text:span text:style-name="T73">temporairement si besoin,</text:span><text:span text:style-name="T60"> </text:span><text:span text:style-name="T70">les </text:span><text:span text:style-name="T74">tags HTML</text:span><text:span text:style-name="T75"> </text:span><text:span text:style-name="T76">et</text:span><text:span text:style-name="T75"> leurs attributs</text:span><text:span text:style-name="T74"> </text:span><text:span text:style-name="T77">ainsi que </text:span><text:span text:style-name="T78">l</text:span><text:span text:style-name="T79">es règles</text:span><text:span text:style-name="T80"> </text:span><text:span text:style-name="T81">CSS</text:span><text:span text:style-name="T82">.</text:span></text:p>
            <text:p text:style-name="P60"><text:span text:style-name="T83">Pour test</text:span><text:span text:style-name="T84">er </text:span><text:span text:style-name="T85">si un </text:span><text:span text:style-name="T78">site Web </text:span><text:span text:style-name="T84">est ada</text:span><text:span text:style-name="T78">p</text:span><text:span text:style-name="T84">tatif, </text:span><text:span text:style-name="T85">j’</text:span><text:span text:style-name="T86">ai</text:span><text:span text:style-name="T85"> </text:span><text:span text:style-name="T86">installé </text:span><text:span text:style-name="T78">le</text:span><text:span text:style-name="T83"> </text:span><text:span text:style-name="T69"><text:s/></text:span><text:span text:style-name="T87">plugin</text:span><text:span text:style-name="T69"> </text:span><text:a xlink:type="simple" xlink:href="https://chromewebstore.google.com/detail/mobile-simulator-responsi/ckejmhbmlajgoklhgbapkiccekfoccmk" text:style-name="Internet_20_link" text:visited-style-name="Visited_20_Internet_20_Link"><text:span text:style-name="T69">Mobile Simulator</text:span></text:a><text:span text:style-name="T69"> </text:span><text:span text:style-name="T86">sur </text:span><text:span text:style-name="T88">mes navigateurs</text:span><text:span text:style-name="T69">. </text:span><text:span text:style-name="T89">Il </text:span><text:span text:style-name="T90">me </text:span><text:span text:style-name="T83">facilit</text:span><text:span text:style-name="T78">e </text:span><text:span text:style-name="T83">le test </text:span><text:span text:style-name="T78">des media-queries </text:span><text:span text:style-name="T89">en </text:span><text:span text:style-name="T83">pass</text:span><text:span text:style-name="T89">ant </text:span><text:span text:style-name="T83">d’une simulation de </text:span><text:span text:style-name="T89">téléphone mobile </text:span><text:span text:style-name="T83">à l’autre </text:span><text:span text:style-name="T89">en un </text:span><text:span text:style-name="T83">cli</text:span><text:span text:style-name="T88">c. Il </text:span><text:span text:style-name="T89">permet </text:span><text:span text:style-name="T88">aussi l</text:span><text:span text:style-name="T89">a capture d’écran du </text:span><text:span text:style-name="T90">sur un </text:span><text:span text:style-name="T91">navigateur </text:span><text:span text:style-name="T90">mobile simulé</text:span><text:span text:style-name="T83">. </text:span><text:span text:style-name="T92">DevTools </text:span><text:span text:style-name="T93">propose </text:span><text:span text:style-name="T92">en standard <text:s/></text:span><text:span text:style-name="T93">la </text:span><text:span text:style-name="T92">fonctionnalité </text:span><text:span text:style-name="T93">de simulation de dimensions </text:span><text:span text:style-name="T59">mais </text:span><text:span text:style-name="T88">je la trouve </text:span><text:span text:style-name="T94">trop </text:span><text:span text:style-name="T59">enterrée </text:span><text:span text:style-name="T94">au fin fond d</text:span><text:span text:style-name="T59">es menus </text:span><text:span text:style-name="T88">et elle n’est pas préconfigurée avec les résolutions des téléphones récents, même si cela peut être configuré</text:span><text:span text:style-name="T59">. </text:span></text:p>
            <text:p text:style-name="P61"><text:span text:style-name="T59"><text:line-break/></text:span><text:span text:style-name="T94">P</text:span><text:span text:style-name="T95">endant </text:span><text:span text:style-name="T94">la 2eme phase d’alternance, </text:span><text:span text:style-name="T96">on a </text:span><text:span text:style-name="T95">développé</text:span><text:span text:style-name="T96"> </text:span><text:span text:style-name="T95">une </text:span><text:span text:style-name="T94">application </text:span><text:span text:style-name="T96">des </text:span><text:span text:style-name="T94">g</text:span><text:span text:style-name="T96">estion de </text:span><text:span text:style-name="T94">médiathèque. </text:span><text:span text:style-name="T96">Elle </text:span><text:span text:style-name="T97">n’a pas été déployée </text:span><text:span text:style-name="T98">en-ligne, </text:span><text:span text:style-name="T97">mais chacun l’</text:span><text:span text:style-name="T98">a fait fonctionner </text:span><text:span text:style-name="T97">en local sur sa machine. J’ai </text:span><text:span text:style-name="T94">installé et configuré </text:span><text:a xlink:type="simple" xlink:href="https://documentation.mamp.info/en/MAMP-Mac/index.html" text:style-name="Internet_20_link" text:visited-style-name="Visited_20_Internet_20_Link"><text:span text:style-name="T99">M</text:span><text:span text:style-name="T100">AMP</text:span></text:a><text:span text:style-name="T59"> </text:span><text:span text:style-name="T97">sur mon Mac. Cette pile de</text:span><text:span text:style-name="T101"> logiciels <text:s/></text:span><text:span text:style-name="T97">m’a simplifié l’installation , la configuration initiale </text:span><text:span text:style-name="T101">et la gestion (arrêt/démarrage)</text:span><text:span text:style-name="T97"> </text:span><text:span text:style-name="T102">de : </text:span><text:span text:style-name="T103">Apache</text:span><text:span text:style-name="T94"> (Serveur Web), </text:span><text:a xlink:type="simple" xlink:href="https://dev.mysql.com/doc/refman/8.4/en/installing.html" text:style-name="Internet_20_link" text:visited-style-name="Visited_20_Internet_20_Link"><text:span text:style-name="T104">MySQL</text:span></text:a><text:span text:style-name="T94"> (</text:span><text:span text:style-name="T105">S</text:span><text:span text:style-name="T106">GBDR</text:span><text:span text:style-name="T95"> : </text:span><text:span text:style-name="T106">S</text:span><text:span text:style-name="T105">ystème de Gestion de Base de Données Relationnelles</text:span><text:span text:style-name="T94">), </text:span><text:span text:style-name="T103">PHP</text:span><text:span text:style-name="T94"> </text:span><text:span text:style-name="T95">(langage de programmation serveur</text:span><text:span text:style-name="T97">). <text:line-break/><text:line-break/></text:span><text:span text:style-name="T107">E</text:span><text:span text:style-name="T88">nsuite </text:span><text:span text:style-name="T107">j’ai cherché </text:span><text:span text:style-name="T101">comment</text:span><text:span text:style-name="T97"> </text:span><text:a xlink:type="simple" xlink:href="https://github.com/laplateformeio/php-martigues-group-03/issues/40" text:style-name="Internet_20_link" text:visited-style-name="Visited_20_Internet_20_Link"><text:span text:style-name="T108">configur</text:span><text:span text:style-name="T109">er</text:span><text:span text:style-name="T108"> </text:span><text:span text:style-name="T109">un</text:span><text:span text:style-name="T108"> </text:span><text:span text:style-name="T110">Virtual Host</text:span></text:a><text:span text:style-name="T110"> </text:span><text:span text:style-name="T111">dans </text:span><text:span text:style-name="T112">Apache</text:span><text:span text:style-name="T111"> </text:span><text:span text:style-name="T88">afin d’é</text:span><text:span text:style-name="T101">viter que les fichiers sensibles (</text:span><text:span text:style-name="T113">comme le </text:span><text:span text:style-name="T101">schéma de base de données) </text:span><text:span text:style-name="T113">présent dans le code source du projet </text:span><text:span text:style-name="T101">ne soient exposés sur le serveur Web</text:span><text:span text:style-name="T97">. </text:span><text:span text:style-name="T101">Le but étant de compartimenter la partie publique </text:span><text:span text:style-name="T88">pour n’</text:span><text:span text:style-name="T101">expos</text:span><text:span text:style-name="T88">er que ce qui doit l’être</text:span><text:span text:style-name="T96"> !</text:span></text:p>
            <text:p text:style-name="P62"><text:span text:style-name="T114">Pour </text:span><text:span text:style-name="T94">le développement </text:span><text:span text:style-name="T86">des app</text:span><text:span text:style-name="T90">lication</text:span><text:span text:style-name="T86">s </text:span><text:span text:style-name="T98">Java (Desktop, Web et API REST), j’ai installé, configuré </text:span><text:span text:style-name="T115">plusieurs </text:span><text:span text:style-name="T98">versions d</text:span><text:span text:style-name="T90">u SGBD</text:span><text:span text:style-name="T98"> </text:span><text:span text:style-name="T115">MySQL </text:span><text:span text:style-name="T116">sur Mac </text:span><text:span text:style-name="T117">(8.0 et 8.4) </text:span><text:span text:style-name="T116">et trouvé </text:span><text:span text:style-name="T118">comment </text:span><text:span text:style-name="T116">les faire coexister et </text:span><text:span text:style-name="T118">fonctionner </text:span><text:span text:style-name="T116">simultanément même après des mises à jours ;-) (</text:span><text:a xlink:type="simple" xlink:href="https://share.note.sx/kcnzsd6r#uY9ARYuyo5WRl1Km2Yu3NIyZAUoPWTxiiGhCOsOQcDo" text:style-name="Internet_20_link" text:visited-style-name="Visited_20_Internet_20_Link"><text:span text:style-name="T116">Plus de détails ici</text:span></text:a><text:span text:style-name="T116">).<text:line-break/></text:span></text:p>
            <text:p text:style-name="P63"><text:span text:style-name="T113">Pour les projets </text:span><text:span text:style-name="T119">Java</text:span><text:span text:style-name="T113">, j’ai installé l</text:span><text:span text:style-name="T114">e</text:span><text:span text:style-name="T113">s versions 17 et 21 <text:s/>du </text:span><text:span text:style-name="T120">JDK </text:span><text:span text:style-name="T114">(</text:span><text:span text:style-name="T121">Java Development Ki</text:span><text:span text:style-name="T122">t</text:span><text:span text:style-name="T114">), </text:span><text:span text:style-name="T123">Maven </text:span><text:span text:style-name="T59">(</text:span><text:span text:style-name="T113">un </text:span><text:span text:style-name="T59">outil de gestion </text:span><text:span text:style-name="T113">des dépendances </text:span><text:span text:style-name="T59">et de construction de projet</text:span><text:span text:style-name="T113">s</text:span><text:span text:style-name="T59"> Java),</text:span><text:span text:style-name="T124"> </text:span><text:span text:style-name="T125">Liquibase</text:span><text:span text:style-name="T124"> (pour gérer l’application des changements du schéma de base de données <text:s/></text:span><text:span text:style-name="T126">avec des </text:span><text:span text:style-name="T124">fichiers de migration</text:span><text:span text:style-name="T127">)</text:span><text:span text:style-name="T124"> </text:span><text:span text:style-name="T126">et </text:span><text:span text:style-name="T127">enfin </text:span><text:span text:style-name="T128">Spring Boot</text:span><text:span text:style-name="T129"> (</text:span><text:span text:style-name="T130">un framework </text:span><text:span text:style-name="T131">que j’ai utilisé pour</text:span><text:span text:style-name="T130"> construire des applications </text:span><text:span text:style-name="T132">Java </text:span><text:span text:style-name="T130">back-end </text:span><text:span text:style-name="T131">(API REST, Web App, ligne de commande) </text:span><text:span text:style-name="T130">avec de la configuration </text:span><text:span text:style-name="T131">et une infrastructure </text:span><text:span text:style-name="T130">par défaut </text:span><text:span text:style-name="T133">qui permet</text:span><text:span text:style-name="T132">tent</text:span><text:span text:style-name="T133"> </text:span><text:span text:style-name="T131">de</text:span><text:span text:style-name="T133"> se concentrer sur le métier </text:span><text:span text:style-name="T131">dès le début </text:span><text:span text:style-name="T132">du dzveloppement.</text:span><text:span text:style-name="T59"> <text:line-break/></text:span></text:p>
            <text:p text:style-name="P64"><text:span text:style-name="T90">Je </text:span><text:span text:style-name="T113">n ‘envisage p</text:span><text:span text:style-name="T134">as</text:span><text:span text:style-name="T90"> le développement </text:span><text:span text:style-name="T135">Java</text:span><text:span text:style-name="T118"> </text:span><text:span text:style-name="T134">sans un </text:span><text:span text:style-name="T136">IDE </text:span><text:span text:style-name="T137">(Integrated Development Environment</text:span><text:span text:style-name="T138">)</text:span><text:span text:style-name="T90">. </text:span><text:span text:style-name="T113">C’est pourquoi j</text:span><text:span text:style-name="T90">’ai installé </text:span><text:span text:style-name="T123">IntelliJ IDEA, </text:span><text:span text:style-name="T118">pratique et bourré de fonctionnalités utiles, telles que la recherche floue, </text:span><text:span text:style-name="T139">le re-factoring, génération de code répétitif, </text:span><text:span text:style-name="T140">la visualisation et la navigation d’un arbre d’héritage, </text:span><text:span text:style-name="T141">le </text:span><text:span text:style-name="T139">debugger, </text:span><text:span text:style-name="T141">le pair-programming avec Code-With-Me..</text:span><text:span text:style-name="T118">.</text:span></text:p>
            <text:p text:style-name="P65" loext:marker-style-name="T29"><text:span text:style-name="T142">J</text:span><text:span text:style-name="T143">’</text:span><text:span text:style-name="T142">a</text:span><text:span text:style-name="T144">i</text:span><text:span text:style-name="T142"> </text:span><text:span text:style-name="T145">aussi </text:span><text:span text:style-name="T142">installé, configuré et utilisé les IDEs </text:span><text:span text:style-name="T146">VsCode <text:s/></text:span><text:span text:style-name="T142">puis </text:span><text:span text:style-name="T146">WebStorm</text:span><text:span text:style-name="T147"> </text:span><text:span text:style-name="T142">pour développer de la partie </text:span><text:span text:style-name="T146">front-end </text:span><text:span text:style-name="T142">des applications</text:span><text:span text:style-name="T146">.</text:span><text:span text:style-name="Placeholder_20_Text"><text:span text:style-name="T146"><text:line-break/><text:line-break/></text:span></text:span><text:span text:style-name="T148">- </text:span><text:span text:style-name="T149">Git </text:span><text:span text:style-name="T150">: Gestionnaire de versions de fichiers </text:span><text:span text:style-name="T151">utilisé pour tous mes projet.</text:span></text:p>
            <text:p text:style-name="Code_20_Block"><text:soft-page-break/><text:span text:style-name="Placeholder_20_Text">brew install git </text:span><text:span text:style-name="Placeholder_20_Text"><text:span text:style-name="T152">gh</text:span></text:span></text:p>
            <text:p text:style-name="P66"><text:span text:style-name="Placeholder_20_Text"><text:span text:style-name="T153"><text:line-break/></text:span></text:span><text:span text:style-name="T154">J</text:span><text:span text:style-name="T153">’héberg</text:span><text:span text:style-name="T155">e la plupart d</text:span><text:span text:style-name="T153">e mes dépôts Git s</text:span><text:span text:style-name="T156">ur </text:span><text:a xlink:type="simple" xlink:href="https://github.com/orgs/ebouchut-laplateforme/repositories" text:style-name="Internet_20_link" text:visited-style-name="Visited_20_Internet_20_Link"><text:span text:style-name="T157">Git</text:span><text:span text:style-name="T158">Hub</text:span></text:a><text:span text:style-name="T153">. <text:line-break/>Je trouv</text:span><text:span text:style-name="T159">e </text:span><text:a xlink:type="simple" xlink:href="https://cli.github.com/" text:style-name="Internet_20_link" text:visited-style-name="Visited_20_Internet_20_Link"><text:span text:style-name="T154">gh (GitHub CLI) </text:span></text:a><text:span text:style-name="T153">pratique par exemple pou</text:span><text:span text:style-name="T160">r déclencher des opérations GitHu</text:span><text:span text:style-name="T153">b depuis la ligne de command</text:span><text:span text:style-name="T160">e comme par exemp</text:span><text:span text:style-name="T153">le créer/cloner un dépôt GitHub <text:s/>ou récupérer le code d’un</text:span><text:span text:style-name="T160">e branche d</text:span><text:span text:style-name="T153">e P</text:span><text:span text:style-name="T161">R</text:span><text:span text:style-name="T162"> (Pull Reque</text:span><text:span text:style-name="T161">st</text:span><text:span text:style-name="T153">) en local</text:span><text:span text:style-name="T160">, ouvrir une issue, lister les P</text:span><text:span text:style-name="T153">R</text:span><text:span text:style-name="T156">s</text:span>.</text:p>
            <text:p text:style-name="P67"><text:span text:style-name="T148">- </text:span><text:span text:style-name="T149">Node.js</text:span><text:span text:style-name="T150"> : </text:span><text:span text:style-name="T163">Un environnement d’exécution de </text:span><text:span text:style-name="T164">Javascript </text:span><text:span text:style-name="T163">coté serveur souvent utilisé pour les applications Web.</text:span></text:p>
            <text:p text:style-name="Code_20_Block"><text:span text:style-name="Placeholder_20_Text">brew install node</text:span></text:p>
            <text:p text:style-name="P68"><text:span text:style-name="T165">C</text:span><text:span text:style-name="T166">haque </text:span><text:span text:style-name="T167">projet </text:span><text:span text:style-name="T166">front-end </text:span><text:span text:style-name="T165">doit pouvoir </text:span><text:span text:style-name="T166">utilise</text:span><text:span text:style-name="T165">r </text:span><text:span text:style-name="T168">sa propre </text:span><text:span text:style-name="T166">version de Node.js</text:span><text:span text:style-name="T165">.<text:line-break/>C</text:span><text:span text:style-name="T166">hanger la version d</text:span><text:span text:style-name="T165">u </text:span><text:span text:style-name="T169">Node.js</text:span><text:span text:style-name="T166"> installé</text:span><text:span text:style-name="T165"> </text:span><text:span text:style-name="T166">globalement sur le système à</text:span><text:span text:style-name="T165"> chaque changement de projet </text:span><text:span text:style-name="T166">n’est pas envisageable. </text:span><text:span text:style-name="T165"><text:s/><text:line-break/></text:span><text:span text:style-name="T166">C’est pourquoi j’ai installé et j’utilise </text:span><text:a xlink:type="simple" xlink:href="https://github.com/Schniz/fnm" text:style-name="Internet_20_link" text:visited-style-name="Visited_20_Internet_20_Link"><text:span text:style-name="T170">fnm</text:span></text:a><text:span text:style-name="T165"> un des </text:span><text:span text:style-name="T166">gestionnaire</text:span><text:span text:style-name="T165">s </text:span><text:span text:style-name="T166">de versions </text:span><text:span text:style-name="T165">de </text:span><text:span text:style-name="T169">Node.js</text:span><text:span text:style-name="T171">.<text:line-break/></text:span><text:span text:style-name="T172">Il permet d'installer, changer de version de Node.js, </text:span></text:p>
            <text:p text:style-name="P69"><text:span text:style-name="T173">- </text:span><text:span text:style-name="T174">npm : u</text:span><text:span text:style-name="T173">n gestionnaire de dépendances pour </text:span><text:span text:style-name="T175">Node.js.</text:span><text:span text:style-name="T173">. Il permet de déclarer les dépendances du projet tout en résolvant les conflits, les télécharger (et les mettre à jour si demandé et nécessaire), les installer/désinstaller.</text:span></text:p>
            <text:p text:style-name="Code_20_Block"><text:span text:style-name="Placeholder_20_Text"><text:span text:style-name="T173">brew install </text:span></text:span><text:span text:style-name="Placeholder_20_Text"><text:span text:style-name="T176">npm</text:span></text:span></text:p>
            <text:p text:style-name="P69" loext:marker-style-name="T29"><text:span text:style-name="Placeholder_20_Text"><text:span text:style-name="T173">-</text:span></text:span><text:span text:style-name="T173"> </text:span><text:a xlink:type="simple" xlink:href="https://github.com/ebouchut/mars-ai-project/issues/31" text:style-name="Internet_20_link" text:visited-style-name="Visited_20_Internet_20_Link"><text:span text:style-name="T177">TypeScript</text:span></text:a><text:span text:style-name="T178"> : </text:span><text:span text:style-name="T179">Un sur-ensemble de Javascript qui permet de bénéficier du typage statique.</text:span></text:p>
            <text:p text:style-name="P70"><text:span text:style-name="T180"/></text:p>
            <text:p text:style-name="P71"><text:span text:style-name="T181">J’ai installé l’</text:span><text:span text:style-name="T182">environnement de virtualisation </text:span><text:span text:style-name="T183">d'abord </text:span><text:span text:style-name="T184">Docker</text:span><text:span text:style-name="T182">, </text:span><text:span text:style-name="T185">puis </text:span><text:span text:style-name="T186">Podman</text:span><text:span text:style-name="T182"> </text:span><text:span text:style-name="T181">pour</text:span><text:span text:style-name="T182"> cont</text:span><text:span text:style-name="T181">eneuri</text:span><text:span text:style-name="T182">ser </text:span><text:span text:style-name="T181">certaines parties de </text:span><text:span text:style-name="T182">mes applications </text:span><text:span text:style-name="T181">back-end qui peuvent </text:span><text:span text:style-name="T183">tourner</text:span><text:span text:style-name="T181"> sous forme de </text:span><text:span text:style-name="T182">package</text:span><text:span text:style-name="T181">s </text:span><text:span text:style-name="T182">autonomes.</text:span></text:p>
            <text:p text:style-name="P72"><text:span text:style-name="Placeholder_20_Text"><text:span text:style-name="T185">brew install </text:span></text:span><text:span text:style-name="Placeholder_20_Text"><text:span text:style-name="T182">docker docker-desktop </text:span></text:span><text:span text:style-name="Placeholder_20_Text"><text:span text:style-name="T185">d</text:span></text:span><text:span text:style-name="Placeholder_20_Text"><text:span text:style-name="T182">ocker-compose</text:span></text:span></text:p>
            <text:p text:style-name="P69" loext:marker-style-name="T29"><text:span text:style-name="Placeholder_20_Text"><text:span text:style-name="T187"/></text:span></text:p>
            <text:p text:style-name="P73" loext:marker-style-name="T29"><loext:content-control loext:plain-text="true" loext:alias="1.Décrire tâches effectuées" loext:tag="1.Décrire tâches effectuées" loext:id="-385645656"><text:span text:style-name="Placeholder_20_Text"><text:span text:style-name="T61"><text:line-break/></text:span></text:span><text:span text:style-name="T188"/></loext:content-control></text:p>
            <text:p text:style-name="P74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9" office:value-type="string">
            <text:p text:style-name="P7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9" office:value-type="string">
            <text:p text:style-name="P76" loext:marker-style-name="T29"><text:span text:style-name="T189">J’ai installé les outils systèmes communs à tous les projets sur mon ordinateur </text:span><text:span text:style-name="T190">avec </text:span><text:a xlink:type="simple" xlink:href="https://brew.sh/" text:style-name="Internet_20_link" text:visited-style-name="Visited_20_Internet_20_Link"><text:span text:style-name="Internet_20_link"><text:span text:style-name="T191">HomeBrew</text:span></text:span></text:a><text:span text:style-name="T191"> </text:span><text:span text:style-name="T192">(gestionnaire de packages pour Mac).</text:span></text:p>
            <text:p text:style-name="P76" loext:marker-style-name="T29"><text:span text:style-name="T193">Pour l</text:span><text:span text:style-name="T194">es applications </text:span><text:span text:style-name="T193">qui n’étaient </text:span><text:span text:style-name="T194">pas disponibles via </text:span><text:span text:style-name="T195">HomeBrew </text:span><text:span text:style-name="T193">comme les </text:span><text:span text:style-name="T196">IDE</text:span><text:span text:style-name="T194">, </text:span><text:span text:style-name="T193">j’ai installé l’app Desktop native (macOS).</text:span></text:p>
            <text:p text:style-name="P77"><text:span text:style-name="T148">J’ai trouvé </text:span><text:a xlink:type="simple" xlink:href="https://sdkman.io/" text:style-name="Internet_20_link" text:visited-style-name="Visited_20_Internet_20_Link"><text:span text:style-name="T148">SDKMan!</text:span></text:a><text:span text:style-name="T148"> </text:span><text:span text:style-name="T197">a</text:span><text:span text:style-name="T148">u </text:span><text:span text:style-name="T197">cours </text:span><text:span text:style-name="T148">de mes recherches. <text:line-break/></text:span><text:span text:style-name="T198">C’est un </text:span><text:span text:style-name="T199">gestionnaire de versions de SDKs </text:span><text:span text:style-name="T200">en ligne de commande,</text:span><text:span text:style-name="T201"> </text:span><text:span text:style-name="T202">centré sur l’écosystème Java.<text:line-break/></text:span><text:span text:style-name="T203">Un </text:span><text:span text:style-name="T204">SDK </text:span><text:span text:style-name="T203">peut être un ou outil, une librairie, un framework</text:span><text:span text:style-name="T205">:</text:span><text:span text:style-name="T203"> </text:span><text:span text:style-name="T206">JDK</text:span><text:span text:style-name="T203">, </text:span><text:span text:style-name="T206">Maven</text:span><text:span text:style-name="T203">, </text:span><text:span text:style-name="T206">Spring-Boo</text:span><text:span text:style-name="T207">t </text:span><text:span text:style-name="T208">(d</text:span><text:span text:style-name="T205">ans mon cas</text:span><text:span text:style-name="T209">)</text:span><text:span text:style-name="T205">.</text:span><text:span text:style-name="T203"> </text:span><text:span text:style-name="T198"><text:line-break/></text:span><text:a xlink:type="simple" xlink:href="https://sdkman.io/" text:style-name="Internet_20_link" text:visited-style-name="Visited_20_Internet_20_Link"><text:span text:style-name="T148">SDKMan!</text:span></text:a><text:span text:style-name="T203"> </text:span><text:span text:style-name="T197">est </text:span><text:span text:style-name="T148">très pratique pour chercher </text:span><text:span text:style-name="T203">et </text:span><text:span text:style-name="T148">installer </text:span><text:span text:style-name="T198">plusieurs versions de</text:span><text:span text:style-name="T148"> SDKs <text:line-break/></text:span><text:span text:style-name="T205">Cette </text:span><text:span text:style-name="T148">application m’est </text:span><text:span text:style-name="T210">particulièrement utile pour installer </text:span><text:span text:style-name="T156">plusieurs versions </text:span><text:span text:style-name="T210">de SDKs, </text:span><text:span text:style-name="T156">configurer </text:span><text:span text:style-name="T210">une version spécifique pour tel ou tel projet</text:span><text:span text:style-name="T205"> </text:span><text:span text:style-name="T203">puis permet de </text:span><text:span text:style-name="T197">passer facilement </text:span><text:span text:style-name="T198">d</text:span><text:span text:style-name="T197">’un</text:span><text:span text:style-name="T198">e version </text:span><text:span text:style-name="T197">à l’autre </text:span><text:span text:style-name="T198">sans changer la configuration système (</text:span><text:span text:style-name="T211">PATH</text:span><text:span text:style-name="T198">…)</text:span><text:span text:style-name="T148">. <text:line-break/></text:span><text:soft-page-break/></text:p>
            <text:p text:style-name="P78"><text:span text:style-name="T212">Un</text:span><text:span text:style-name="T213">e fonctionnalité </text:span><text:span text:style-name="T212">que j’utilise au quotidien </text:span><text:span text:style-name="T214">me </text:span><text:span text:style-name="T213">permet de </text:span><text:span text:style-name="T215">changer </text:span><text:span text:style-name="T216">automatiquement la version des SDKs </text:span><text:span text:style-name="T215">vers celle configurée pour un projet </text:span><text:span text:style-name="T216">dès qu</text:span><text:span text:style-name="T215">e je</text:span><text:span text:style-name="T216"> </text:span><text:span text:style-name="T215">me déplace dans le répertoire du projet</text:span><text:span text:style-name="T217">.</text:span></text:p>
            <text:p text:style-name="Code_20_Block">curl -s "https://get.sdkman.io" | bash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9" office:value-type="string">
            <text:p text:style-name="P10" loext:marker-style-name="T29"><text:span text:style-name="T57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table-cell table:style-name="Table8.A12" table:number-columns-spanned="9" office:value-type="string">
            <text:p text:style-name="P79" loext:marker-style-name="T29">J’ai <text:span text:style-name="T218">d’abord </text:span>suivi les conseils et directives des <text:span text:style-name="T219">formateurs</text:span>, puis beaucoup cherché <text:span text:style-name="T220">et investigué </text:span><text:span text:style-name="T219">par moi-</text:span><text:span text:style-name="T221">même</text:span><text:span text:style-name="T220"> pour aller trouver l’information, diagnostiquer les problèmes rencontrés avec tous les outils utiles (</text:span><text:span text:style-name="T221">doc officielle, moteurs de recherche, IA</text:span><text:span text:style-name="T220">), documenté pour mon futur moi et pour d’autres (j’adore ça) partagé les solutions et astuces que j’ai découvertes et appelé à l’aide auprès du groupe </text:span><text:span text:style-name="T218">quand ça a été nécessaire et ça l’a été</text:span><text:span text:style-name="T222">. <text:line-break/><text:line-break/>J’ai trouvé l’aspect dynamique de groupe pour l’apprentissage particulièrement intéressant et enrichissant à la fois sur le plan humain que technique.</text:span><text:span text:style-name="T220">. </text:span></text:p>
            <text:p text:style-name="Standard"><text:span text:style-name="T218"><text:s/></text:span><text:span text:style-name="T220">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3">
          <table:table-cell table:style-name="Table8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4">
          <table:table-cell table:style-name="Table8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8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G16" table:number-columns-spanned="3" office:value-type="string">
            <text:p text:style-name="P4" loext:marker-style-name="T29"><loext:content-control loext:plain-text="true" loext:alias="AT1 - Nom entreprise" loext:tag="AT1 - Nom entreprise" loext:id="1760476516"><text:span text:style-name="Placeholder_20_Text"><text:span text:style-name="T225">La Plateforme (formation) et Eureka (alternance)</text:span></text:span><text:span text:style-name="T226"/></loext:content-control></text:p>
          </table:table-cell>
          <table:covered-table-cell/>
          <table:covered-table-cell/>
        </table:table-row>
        <table:table-row table:style-name="Table8.17">
          <table:table-cell table:style-name="Table8.A17" table:number-columns-spanned="2" office:value-type="string">
            <text:p text:style-name="P82" loext:marker-style-name="T227"/>
          </table:table-cell>
          <table:covered-table-cell/>
          <table:table-cell table:style-name="Table8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8.C18" office:value-type="string">
            <text:p text:style-name="P83" loext:marker-style-name="T29"><text:span text:style-name="T6"></text:span><text:span text:style-name="T228"/></text:p>
          </table:table-cell>
          <table:table-cell table:style-name="Table8.D18" table:number-columns-spanned="6" office:value-type="string">
            <text:p text:style-name="P4" loext:marker-style-name="T29"><loext:content-control loext:plain-text="true" loext:alias="AT1 - Chantier" loext:tag="AT1 - Chantier" loext:id="-466733595"><text:span text:style-name="Placeholder_20_Text"><text:span text:style-name="T218">Toutes les périodes (en formation et alternance).</text:span></text:span><text:span text:style-name="T218"/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8.C19" office:value-type="string">
            <text:p text:style-name="P83" loext:marker-style-name="T29"><text:span text:style-name="T6"></text:span><text:span text:style-name="T228"/></text:p>
          </table:table-cell>
          <table:table-cell table:style-name="Table8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8.F19" table:number-columns-spanned="2" office:value-type="string">
            <text:p text:style-name="P4" loext:marker-style-name="T29"><field:fieldmark-start text:name="__Fieldmark__7365_2448145832" field:type="vnd.oasis.opendocument.field.FORMDATE"><field:param field:name="DateField_CurrentDate" field:value="2025-06-17"/><field:param field:name="DateField_DateFormat" field:value="dd/MM/yyyy"/><field:param field:name="DateField_DateFormat_Language" field:value="fr-FR"/></field:fieldmark-start><field:fieldmark-separator/><text:span text:style-name="Placeholder_20_Text">17/06/2025</text:span><field:fieldmark-end/></text:p>
          </table:table-cell>
          <table:covered-table-cell/>
          <table:table-cell table:style-name="Table8.H19" office:value-type="string">
            <text:p text:style-name="P10" loext:marker-style-name="T29"><text:span text:style-name="T57">au</text:span><text:span text:style-name="T57"/></text:p>
          </table:table-cell>
          <table:table-cell table:style-name="Table8.I19" office:value-type="string">
            <text:p text:style-name="P4" loext:marker-style-name="T29"><field:fieldmark-start text:name="__Fieldmark__7385_2448145832" field:type="vnd.oasis.opendocument.field.FORMDATE"><field:param field:name="DateField_CurrentDate" field:value="2025-07-03"/><field:param field:name="DateField_DateFormat" field:value="dd/MM/yyyy"/><field:param field:name="DateField_DateFormat_Language" field:value="fr-FR"/></field:fieldmark-start><field:fieldmark-separator/><text:span text:style-name="Placeholder_20_Text">03/07/2025</text:span><field:fieldmark-end/></text:p>
          </table:table-cell>
        </table:table-row>
        <table:table-row table:style-name="Table8.20">
          <table:table-cell table:style-name="Table8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9" office:value-type="string">
            <text:p text:style-name="P84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 loext:marker-style-name="T27"/>
      <text:p text:style-name="P85" loext:marker-style-name="T2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B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55" loext:marker-style-name="T53"><text:span text:style-name="T53">Activité-type</text:span></text:p>
          </table:table-cell>
          <table:table-cell table:style-name="Table9.A1" table:number-columns-spanned="3" office:value-type="string">
            <text:p text:style-name="P56" loext:marker-style-name="T53"><text:drop-down text:name=""><text:label text:value="2"/><text:label text:value="3"/><text:label text:value="4"/><text:label text:value="5"/><text:label text:current-selected="true" text:value="1"/>1</text:drop-down></text:p>
          </table:table-cell>
          <table:covered-table-cell/>
          <table:covered-table-cell/>
          <table:table-cell table:style-name="Table9.A1" table:number-columns-spanned="5" office:value-type="string">
            <text:p text:style-name="P4" loext:marker-style-name="T29"><loext:content-control loext:plain-text="true" loext:alias="Intitulé de l'activité" loext:tag="Intitulé de l'activité" loext:id="-363748849"><text:span text:style-name="T45">Développer la partie front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table:number-columns-spanned="4" office:value-type="string">
            <text:p text:style-name="P57" loext:marker-style-name="T54"><text:span text:style-name="T55">Exemple n°2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9.E2" table:number-columns-spanned="5" office:value-type="string">
            <text:p text:style-name="P4" loext:marker-style-name="T56"><loext:content-control loext:plain-text="true" loext:id="2066595327"><text:bookmark-start text:name="1.2 Maquetter des interfaces utilisateur web ou web mobile"/><text:span text:style-name="T27">Maquetter des interfaces utilisateur web ou web mobile</text:span><text:bookmark-end text:name="1.2 Maquetter des interfaces utilisateur web ou web mobil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3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9.E3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9" office:value-type="string">
            <text:p text:style-name="P86" loext:marker-style-name="T29"><text:span text:style-name="Placeholder_20_Text"><text:span text:style-name="T230"><draw:frame draw:style-name="fr1" draw:name="Frame15" text:anchor-type="as-char" draw:z-index="125"><draw:text-box fo:min-height="0.041cm" fo:min-width="0.041cm"><text:p text:style-name="P87">Au cours de la <text:span text:style-name="T222">deuxième phase d</text:span>'alternance, j'ai <text:span text:style-name="T231">découvert </text:span><text:span text:style-name="T170">comment faire la</text:span><text:span text:style-name="T231"> </text:span>maquett<text:span text:style-name="T170">e </text:span>des pages de l'application <text:a xlink:type="simple" xlink:href="https://github.com/ebouchut/mars-ai-project" text:style-name="Internet_20_link" text:visited-style-name="Visited_20_Internet_20_Link">Mars-ai</text:a> avec <text:span text:style-name="T219">Figma</text:span>.</text:p></draw:text-box></draw:frame></text:span></text:span><loext:content-control loext:showing-place-holder="true" loext:plain-text="true" loext:alias="1.Décrire tâches effectuées" loext:tag="1.Décrire tâches effectuées" loext:id="10827166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8">
          <table:table-cell table:style-name="Table9.A8" table:number-columns-spanned="9" office:value-type="string">
            <text:p text:style-name="Text_20_body"><text:span text:style-name="T232"><text:line-break/>J'ai </text:span><text:span text:style-name="T170">principalement </text:span><text:span text:style-name="T232">utilisé </text:span>Figma<text:span text:style-name="T232">.</text:span>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0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9.11">
          <table:table-cell table:style-name="Table9.A11" table:number-columns-spanned="9" office:value-type="string">
            <text:p text:style-name="P74" loext:marker-style-name="T29"><text:span text:style-name="T231">J'ai travaillé </text:span><text:span text:style-name="T170">en </text:span><text:span text:style-name="T231">équipe </text:span><text:span text:style-name="T170">(</text:span><text:span text:style-name="T231">5 </text:span><text:span text:style-name="T170">alternants)</text:span><text:span text:style-name="T23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2">
          <table:table-cell table:style-name="Table9.A12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3">
          <table:table-cell table:style-name="Table9.A13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4">
          <table:table-cell table:style-name="Table9.A14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9.G14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9.15">
          <table:table-cell table:style-name="Table9.A15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G15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-433287995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9.16">
          <table:table-cell table:style-name="Table9.A16" table:number-columns-spanned="2" office:value-type="string">
            <text:p text:style-name="P82" loext:marker-style-name="T227"/>
          </table:table-cell>
          <table:covered-table-cell/>
          <table:table-cell table:style-name="Table9.C16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7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9.C17" office:value-type="string">
            <text:p text:style-name="P83" loext:marker-style-name="T29"><text:span text:style-name="T6"></text:span><text:span text:style-name="T228"/></text:p>
          </table:table-cell>
          <table:table-cell table:style-name="Table9.D17" table:number-columns-spanned="6" office:value-type="string">
            <text:p text:style-name="P88" loext:marker-style-name="T29"><text:span text:style-name="Placeholder_20_Text"><text:span text:style-name="T222">Atelier 2: </text:span></text:span><loext:content-control loext:plain-text="true" loext:alias="AT1 - Chantier" loext:tag="AT1 - Chantier" loext:id="-1208479094"><text:span text:style-name="Placeholder_20_Text"><text:span text:style-name="T222">2-ème phase d'alternance .</text:span></text:span><text:span text:style-name="T222"/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8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9.C18" office:value-type="string">
            <text:p text:style-name="P83" loext:marker-style-name="T29"><text:span text:style-name="T6"></text:span><text:span text:style-name="T228"/></text:p>
          </table:table-cell>
          <table:table-cell table:style-name="Table9.D18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9.F18" table:number-columns-spanned="2" office:value-type="string">
            <text:p text:style-name="P4" loext:marker-style-name="T29"><field:fieldmark-start text:name="__Fieldmark__7604_2448145832" field:type="vnd.oasis.opendocument.field.FORMDATE"><field:param field:name="DateField_CurrentDate" field:value="2026-01-05"/><field:param field:name="DateField_DateFormat" field:value="dd/MM/yyyy"/><field:param field:name="DateField_DateFormat_Language" field:value="fr-FR"/></field:fieldmark-start><field:fieldmark-separator/><text:span text:style-name="Placeholder_20_Text">05/01/2026</text:span><field:fieldmark-end/></text:p>
          </table:table-cell>
          <table:covered-table-cell/>
          <table:table-cell table:style-name="Table9.H18" office:value-type="string">
            <text:p text:style-name="P10" loext:marker-style-name="T29"><text:span text:style-name="T57">au</text:span><text:span text:style-name="T57"/></text:p>
          </table:table-cell>
          <table:table-cell table:style-name="Table9.I18" office:value-type="string">
            <text:p text:style-name="P4" loext:marker-style-name="T29"><field:fieldmark-start text:name="__Fieldmark__7624_2448145832" field:type="vnd.oasis.opendocument.field.FORMDATE"><field:param field:name="DateField_CurrentDate" field:value="2026-03-19"/><field:param field:name="DateField_DateFormat" field:value="dd/MM/yyyy"/><field:param field:name="DateField_DateFormat_Language" field:value="fr-FR"/></field:fieldmark-start><field:fieldmark-separator/><text:span text:style-name="Placeholder_20_Text">19/03/2026</text:span><field:fieldmark-end/></text:p>
          </table:table-cell>
        </table:table-row>
        <table:table-row table:style-name="Table9.19">
          <table:table-cell table:style-name="Table9.A19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0">
          <table:table-cell table:style-name="Table9.A20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-1581284423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 loext:marker-style-name="T27"/>
      <text:p text:style-name="P47" loext:marker-style-name="T27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9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B"/>
        <table:table-column table:style-name="Table10.H"/>
        <table:table-column table:style-name="Table10.I"/>
        <table:table-row table:style-name="Table10.1">
          <table:table-cell table:style-name="Table10.A1" office:value-type="string">
            <text:p text:style-name="P53" loext:marker-style-name="T53"/>
          </table:table-cell>
          <table:table-cell table:style-name="Table10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0.A1" table:number-columns-spanned="5" office:value-type="string"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55" loext:marker-style-name="T53"><text:span text:style-name="T53">Activité-type</text:span></text:p>
          </table:table-cell>
          <table:table-cell table:style-name="Table10.A1" table:number-columns-spanned="3" office:value-type="string">
            <text:p text:style-name="P56" loext:marker-style-name="T53"><text:drop-down text:name=""><text:label text:value="2"/><text:label text:value="3"/><text:label text:value="4"/><text:label text:value="5"/><text:label text:current-selected="true" text:value="1"/>1</text:drop-down></text:p>
          </table:table-cell>
          <table:covered-table-cell/>
          <table:covered-table-cell/>
          <table:table-cell table:style-name="Table10.A1" table:number-columns-spanned="5" office:value-type="string">
            <text:p text:style-name="P4" loext:marker-style-name="T29"><loext:content-control loext:plain-text="true" loext:alias="Intitulé de l'activité" loext:tag="Intitulé de l'activité" loext:id="-1992633023"><text:span text:style-name="T45">Développer la partie front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0.3">
          <table:table-cell table:style-name="Table10.A3" table:number-columns-spanned="4" office:value-type="string">
            <text:p text:style-name="P57" loext:marker-style-name="T54"><text:span text:style-name="T55">Exemple n°3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10.E3" table:number-columns-spanned="5" office:value-type="string">
            <text:p text:style-name="P4" loext:marker-style-name="T56"><loext:content-control loext:plain-text="true" loext:id="1985191420"><text:bookmark-start text:name="1.3 Réaliser des interfaces utilisateur statiques Web ou Web mobile"/><text:span text:style-name="T27">Réaliser des interfaces utilisateur statiques web ou web mobile</text:span><text:bookmark-end text:name="1.3 Réaliser des interfaces utilisateur statiques Web ou Web mobil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0.3">
          <table:table-cell table:style-name="Table10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0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9" office:value-type="string">
            <text:p text:style-name="P74" loext:marker-style-name="T29"><loext:content-control loext:showing-place-holder="true" loext:plain-text="true" loext:alias="1.Décrire tâches effectuées" loext:tag="1.Décrire tâches effectuées" loext:id="755171285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8">
          <table:table-cell table:style-name="Table10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232286082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><text:soft-page-break/></text:p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2">
          <table:table-cell table:style-name="Table10.A12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887997681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3">
          <table:table-cell table:style-name="Table10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4">
          <table:table-cell table:style-name="Table10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0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0.16">
          <table:table-cell table:style-name="Table10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0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-963584573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0.17">
          <table:table-cell table:style-name="Table10.A17" table:number-columns-spanned="2" office:value-type="string">
            <text:p text:style-name="P82" loext:marker-style-name="T227"/>
          </table:table-cell>
          <table:covered-table-cell/>
          <table:table-cell table:style-name="Table10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0.C18" office:value-type="string">
            <text:p text:style-name="P83" loext:marker-style-name="T29"><text:span text:style-name="T6"></text:span><text:span text:style-name="T228"/></text:p>
          </table:table-cell>
          <table:table-cell table:style-name="Table10.D18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-15306627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0.C19" office:value-type="string">
            <text:p text:style-name="P83" loext:marker-style-name="T29"><text:span text:style-name="T6"></text:span><text:span text:style-name="T228"/></text:p>
          </table:table-cell>
          <table:table-cell table:style-name="Table10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0.F19" table:number-columns-spanned="2" office:value-type="string">
            <text:p text:style-name="P4" loext:marker-style-name="T29"><field:fieldmark-start text:name="__Fieldmark__7828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0.H19" office:value-type="string">
            <text:p text:style-name="P10" loext:marker-style-name="T29"><text:span text:style-name="T57">au</text:span><text:span text:style-name="T57"/></text:p>
          </table:table-cell>
          <table:table-cell table:style-name="Table10.I19" office:value-type="string">
            <text:p text:style-name="P4" loext:marker-style-name="T29"><field:fieldmark-start text:name="__Fieldmark__7848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0.20">
          <table:table-cell table:style-name="Table10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-1971276624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 loext:marker-style-name="T27"/>
      <text:p text:style-name="P85" loext:marker-style-name="T2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B"/>
        <table:table-column table:style-name="Table11.H"/>
        <table:table-column table:style-name="Table11.I"/>
        <table:table-row table:style-name="Table11.1">
          <table:table-cell table:style-name="Table11.A1" office:value-type="string">
            <text:p text:style-name="P53" loext:marker-style-name="T53"/>
          </table:table-cell>
          <table:table-cell table:style-name="Table11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1.A1" table:number-columns-spanned="5" office:value-type="string"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55" loext:marker-style-name="T53"><text:span text:style-name="T53">Activité-type</text:span></text:p>
          </table:table-cell>
          <table:table-cell table:style-name="Table11.A1" table:number-columns-spanned="3" office:value-type="string">
            <text:p text:style-name="P56" loext:marker-style-name="T53"><text:drop-down text:name=""><text:label text:value="2"/><text:label text:value="3"/><text:label text:value="4"/><text:label text:value="5"/><text:label text:current-selected="true" text:value="1"/>1</text:drop-down></text:p>
          </table:table-cell>
          <table:covered-table-cell/>
          <table:covered-table-cell/>
          <table:table-cell table:style-name="Table11.A1" table:number-columns-spanned="5" office:value-type="string">
            <text:p text:style-name="P4" loext:marker-style-name="T29"><loext:content-control loext:plain-text="true" loext:alias="Intitulé de l'activité" loext:tag="Intitulé de l'activité" loext:id="1759482396"><text:span text:style-name="T45">Développer la partie front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1.3">
          <table:table-cell table:style-name="Table11.A3" table:number-columns-spanned="4" office:value-type="string">
            <text:p text:style-name="P57" loext:marker-style-name="T54"><text:span text:style-name="T55">Exemple n°4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11.E3" table:number-columns-spanned="5" office:value-type="string">
            <text:p text:style-name="P4" loext:marker-style-name="T56"><loext:content-control loext:plain-text="true" loext:id="-1497568348"><text:bookmark-start text:name="1.4 Développer la partie dynamique des interfaces utilisateur Web ou Web mobile"/><text:span text:style-name="T27">Développer la partie dynamique des interfaces utilisateur web ou web mobile</text:span><text:bookmark-end text:name="1.4 Développer la partie dynamique des interfaces utilisateur Web ou Web mobil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1.3">
          <table:table-cell table:style-name="Table11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1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6" table:number-columns-spanned="9" office:value-type="string">
            <text:p text:style-name="P74" loext:marker-style-name="T29"><loext:content-control loext:showing-place-holder="true" loext:plain-text="true" loext:alias="1.Décrire tâches effectuées" loext:tag="1.Décrire tâches effectuées" loext:id="1772128600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8">
          <table:table-cell table:style-name="Table11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1.9">
          <table:table-cell table:style-name="Table11.A9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1515957372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0">
          <table:table-cell table:style-name="Table11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1">
          <table:table-cell table:style-name="Table11.A11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2">
          <table:table-cell table:style-name="Table11.A12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1710528833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3">
          <table:table-cell table:style-name="Table11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4">
          <table:table-cell table:style-name="Table11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5">
          <table:table-cell table:style-name="Table11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1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1.16">
          <table:table-cell table:style-name="Table11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1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-1184736061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1.17">
          <table:table-cell table:style-name="Table11.A17" table:number-columns-spanned="2" office:value-type="string">
            <text:p text:style-name="P82" loext:marker-style-name="T227"/>
          </table:table-cell>
          <table:covered-table-cell/>
          <table:table-cell table:style-name="Table11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1.C18" office:value-type="string">
            <text:p text:style-name="P83" loext:marker-style-name="T29"><text:span text:style-name="T6"></text:span><text:span text:style-name="T228"/></text:p>
          </table:table-cell>
          <table:table-cell table:style-name="Table11.D18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232968723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1.C19" office:value-type="string">
            <text:p text:style-name="P83" loext:marker-style-name="T29"><text:span text:style-name="T6"></text:span><text:span text:style-name="T228"/></text:p>
          </table:table-cell>
          <table:table-cell table:style-name="Table11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1.F19" table:number-columns-spanned="2" office:value-type="string">
            <text:p text:style-name="P4" loext:marker-style-name="T29"><field:fieldmark-start text:name="__Fieldmark__8061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1.H19" office:value-type="string">
            <text:p text:style-name="P10" loext:marker-style-name="T29"><text:span text:style-name="T57">au</text:span><text:span text:style-name="T57"/></text:p>
          </table:table-cell>
          <table:table-cell table:style-name="Table11.I19" office:value-type="string">
            <text:p text:style-name="P4" loext:marker-style-name="T29"><field:fieldmark-start text:name="__Fieldmark__8081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1.20">
          <table:table-cell table:style-name="Table11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1">
          <table:table-cell table:style-name="Table11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2">
          <table:table-cell table:style-name="Table11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1.23">
          <table:table-cell table:style-name="Table11.A23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-25730190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91" loext:marker-style-name="T23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B"/>
        <table:table-column table:style-name="Table12.H"/>
        <table:table-column table:style-name="Table12.I"/>
        <table:table-row table:style-name="Table12.1">
          <table:table-cell table:style-name="Table12.A1" office:value-type="string">
            <text:p text:style-name="P53" loext:marker-style-name="T53"/>
          </table:table-cell>
          <table:table-cell table:style-name="Table12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2.A1" table:number-columns-spanned="5" office:value-type="string"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1" office:value-type="string">
            <text:p text:style-name="P55" loext:marker-style-name="T53"><text:span text:style-name="T53">Activité-type</text:span></text:p>
          </table:table-cell>
          <table:table-cell table:style-name="Table12.A1" table:number-columns-spanned="3" office:value-type="string">
            <text:p text:style-name="P56" loext:marker-style-name="T53"><text:drop-down text:name=""><text:label text:current-selected="true" text:value="2"/><text:label text:value="3"/><text:label text:value="4"/><text:label text:value="5"/>2</text:drop-down></text:p>
          </table:table-cell>
          <table:covered-table-cell/>
          <table:covered-table-cell/>
          <table:table-cell table:style-name="Table12.A1" table:number-columns-spanned="5" office:value-type="string">
            <text:p text:style-name="P4" loext:marker-style-name="T29"><loext:content-control loext:plain-text="true" loext:alias="Intitulé de l'activité" loext:tag="Intitulé de l'activité" loext:id="134308973"><text:bookmark-start text:name="2 Développer la partie back-end d’une application web ou web mobile sécurisée"/><text:span text:style-name="T45">Développer la partie back-end d’une application web ou web mobile sécurisée</text:span><text:bookmark-end text:name="2 Développer la partie back-end d’une application web ou web mobile sécurisé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3" table:number-columns-spanned="4" office:value-type="string">
            <text:p text:style-name="P57" loext:marker-style-name="T54"><text:span text:style-name="T55">Exemple n°5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12.E3" table:number-columns-spanned="5" office:value-type="string">
            <text:p text:style-name="P4" loext:marker-style-name="T56"><loext:content-control loext:plain-text="true" loext:id="6944869"><text:bookmark-start text:name="2.5 Mettre en place une base de données relationnell"/><text:span text:style-name="T27">Mettre en place une base de données relationnelle</text:span><text:bookmark-end text:name="2.5 Mettre en place une base de données relationnell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2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2.5">
          <table:table-cell table:style-name="Table12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6" table:number-columns-spanned="9" office:value-type="string">
            <text:p text:style-name="P74" loext:marker-style-name="T29"><loext:content-control loext:showing-place-holder="true" loext:plain-text="true" loext:alias="1.Décrire tâches effectuées" loext:tag="1.Décrire tâches effectuées" loext:id="-1621211783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8">
          <table:table-cell table:style-name="Table12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2.9">
          <table:table-cell table:style-name="Table12.A9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-1820338648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1">
          <table:table-cell table:style-name="Table12.A11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2">
          <table:table-cell table:style-name="Table12.A12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780768783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3">
          <table:table-cell table:style-name="Table12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4">
          <table:table-cell table:style-name="Table12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2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2.16">
          <table:table-cell table:style-name="Table12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306366431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2.17">
          <table:table-cell table:style-name="Table12.A17" table:number-columns-spanned="2" office:value-type="string">
            <text:p text:style-name="P82" loext:marker-style-name="T227"/>
          </table:table-cell>
          <table:covered-table-cell/>
          <table:table-cell table:style-name="Table12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2.C18" office:value-type="string">
            <text:p text:style-name="P83" loext:marker-style-name="T29"><text:span text:style-name="T6"></text:span><text:span text:style-name="T228"/></text:p>
          </table:table-cell>
          <table:table-cell table:style-name="Table12.D18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19158763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2.C19" office:value-type="string">
            <text:p text:style-name="P83" loext:marker-style-name="T29"><text:span text:style-name="T6"></text:span><text:span text:style-name="T228"/></text:p>
          </table:table-cell>
          <table:table-cell table:style-name="Table12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2.F19" table:number-columns-spanned="2" office:value-type="string">
            <text:p text:style-name="P4" loext:marker-style-name="T29"><field:fieldmark-start text:name="__Fieldmark__828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2.H19" office:value-type="string">
            <text:p text:style-name="P10" loext:marker-style-name="T29"><text:span text:style-name="T57">au</text:span><text:span text:style-name="T57"/></text:p>
          </table:table-cell>
          <table:table-cell table:style-name="Table12.I19" office:value-type="string">
            <text:p text:style-name="P4" loext:marker-style-name="T29"><field:fieldmark-start text:name="__Fieldmark__830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2.20">
          <table:table-cell table:style-name="Table12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1">
          <table:table-cell table:style-name="Table12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2">
          <table:table-cell table:style-name="Table12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2.23">
          <table:table-cell table:style-name="Table12.A23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1667358729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54" loext:marker-style-name="T53"/>
          </table:table-cell>
          <table:table-cell table:style-name="Table12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2.A1" table:number-columns-spanned="5" office:value-type="string"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1" office:value-type="string">
            <text:p text:style-name="P55" loext:marker-style-name="T53"><text:span text:style-name="T53">Activité-type</text:span></text:p>
          </table:table-cell>
          <table:table-cell table:style-name="Table12.A1" table:number-columns-spanned="3" office:value-type="string">
            <text:p text:style-name="P56" loext:marker-style-name="T53"><text:drop-down text:name=""><text:label text:current-selected="true" text:value="2"/><text:label text:value="3"/><text:label text:value="4"/><text:label text:value="5"/>2</text:drop-down></text:p>
          </table:table-cell>
          <table:covered-table-cell/>
          <table:covered-table-cell/>
          <table:table-cell table:style-name="Table12.A1" table:number-columns-spanned="5" office:value-type="string">
            <text:p text:style-name="P4" loext:marker-style-name="T29"><loext:content-control loext:plain-text="true" loext:alias="Intitulé de l'activité" loext:tag="Intitulé de l'activité" loext:id="-1990000224"><text:span text:style-name="T45">Développer la partie back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6" table:number-columns-spanned="4" office:value-type="string">
            <text:p text:style-name="P57" loext:marker-style-name="T54"><text:span text:style-name="T55">Exemple n°6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12.E26" table:number-columns-spanned="5" office:value-type="string">
            <text:p text:style-name="P4" loext:marker-style-name="T56"><loext:content-control loext:plain-text="true" loext:id="452441600"><text:bookmark-start text:name="2.6 Développer des composants d’accès aux données SQL et NoSQL"/><text:span text:style-name="T27">Développer des composants d’accès aux données SQL et NoSQL</text:span><text:bookmark-end text:name="2.6 Développer des composants d’accès aux données SQL et NoSQL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7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2.E27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2.28">
          <table:table-cell table:style-name="Table12.A28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29" table:number-columns-spanned="9" office:value-type="string">
            <text:p text:style-name="P74" loext:marker-style-name="T29"><loext:content-control loext:showing-place-holder="true" loext:plain-text="true" loext:alias="1.Décrire tâches effectuées" loext:tag="1.Décrire tâches effectuées" loext:id="1871873514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8">
          <table:table-cell table:style-name="Table12.A31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2.9">
          <table:table-cell table:style-name="Table12.A32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-1403823261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3">
          <table:table-cell table:style-name="Table12.A33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4">
          <table:table-cell table:style-name="Table12.A34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2">
          <table:table-cell table:style-name="Table12.A35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1020123463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6">
          <table:table-cell table:style-name="Table12.A36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7">
          <table:table-cell table:style-name="Table12.A37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38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2.G38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2.16">
          <table:table-cell table:style-name="Table12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-782340841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2.40">
          <table:table-cell table:style-name="Table12.A40" table:number-columns-spanned="2" office:value-type="string">
            <text:p text:style-name="P82" loext:marker-style-name="T227"/>
          </table:table-cell>
          <table:covered-table-cell/>
          <table:table-cell table:style-name="Table12.C40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41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2.C41" office:value-type="string">
            <text:p text:style-name="P83" loext:marker-style-name="T29"><text:span text:style-name="T6"></text:span><text:span text:style-name="T228"/></text:p>
          </table:table-cell>
          <table:table-cell table:style-name="Table12.D41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1893471252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42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2.C42" office:value-type="string">
            <text:p text:style-name="P83" loext:marker-style-name="T29"><text:span text:style-name="T6"></text:span><text:span text:style-name="T228"/></text:p>
          </table:table-cell>
          <table:table-cell table:style-name="Table12.D42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2.F42" table:number-columns-spanned="2" office:value-type="string">
            <text:p text:style-name="P4" loext:marker-style-name="T29"><field:fieldmark-start text:name="__Fieldmark__851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2.H42" office:value-type="string">
            <text:p text:style-name="P10" loext:marker-style-name="T29"><text:span text:style-name="T57">au</text:span><text:span text:style-name="T57"/></text:p>
          </table:table-cell>
          <table:table-cell table:style-name="Table12.I42" office:value-type="string">
            <text:p text:style-name="P4" loext:marker-style-name="T29"><field:fieldmark-start text:name="__Fieldmark__853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2.20">
          <table:table-cell table:style-name="Table12.A43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4">
          <table:table-cell table:style-name="Table12.A44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5">
          <table:table-cell table:style-name="Table12.A45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2.23">
          <table:table-cell table:style-name="Table12.A46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-1084378516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B"/>
        <table:table-column table:style-name="Table13.H"/>
        <table:table-column table:style-name="Table13.I"/>
        <table:table-row table:style-name="Table13.1">
          <table:table-cell table:style-name="Table13.A1" office:value-type="string">
            <text:p text:style-name="P53" loext:marker-style-name="T53"/>
          </table:table-cell>
          <table:table-cell table:style-name="Table13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3.A1" table:number-columns-spanned="5" office:value-type="string"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" office:value-type="string">
            <text:p text:style-name="P55" loext:marker-style-name="T53"><text:span text:style-name="T53">Activité-type</text:span></text:p>
          </table:table-cell>
          <table:table-cell table:style-name="Table13.A1" table:number-columns-spanned="3" office:value-type="string">
            <text:p text:style-name="P56" loext:marker-style-name="T53"><text:drop-down text:name=""><text:label text:current-selected="true" text:value="2"/><text:label text:value="3"/><text:label text:value="4"/><text:label text:value="5"/>2</text:drop-down></text:p>
          </table:table-cell>
          <table:covered-table-cell/>
          <table:covered-table-cell/>
          <table:table-cell table:style-name="Table13.A1" table:number-columns-spanned="5" office:value-type="string">
            <text:p text:style-name="P4" loext:marker-style-name="T29"><loext:content-control loext:plain-text="true" loext:alias="Intitulé de l'activité" loext:tag="Intitulé de l'activité" loext:id="1415045741"><text:span text:style-name="T45">Développer la partie back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3.3">
          <table:table-cell table:style-name="Table13.A3" table:number-columns-spanned="4" office:value-type="string">
            <text:p text:style-name="P57" loext:marker-style-name="T54"><text:span text:style-name="T55">Exemple n°7</text:span><text:span text:style-name="T54"> <text:s/></text:span><text:span text:style-name="T6"></text:span></text:p>
          </table:table-cell>
          <table:covered-table-cell/>
          <table:covered-table-cell/>
          <table:covered-table-cell/>
          <table:table-cell table:style-name="Table13.E3" table:number-columns-spanned="5" office:value-type="string">
            <text:p text:style-name="P4" loext:marker-style-name="T56"><loext:content-control loext:plain-text="true" loext:id="-623462713"><text:bookmark-start text:name="2.7 Développer des composants métier coté serveur"/><text:span text:style-name="T27">Développer des composants métier coté serveur</text:span><text:bookmark-end text:name="2.7 Développer des composants métier coté serveur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3.3">
          <table:table-cell table:style-name="Table13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3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3.5">
          <table:table-cell table:style-name="Table13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6" table:number-columns-spanned="9" office:value-type="string">
            <text:p text:style-name="P92" loext:marker-style-name="T29"><text:span text:style-name="Placeholder_20_Text"><text:span text:style-name="T2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7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8">
          <table:table-cell table:style-name="Table13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3.9">
          <table:table-cell table:style-name="Table13.A9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409666462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0">
          <table:table-cell table:style-name="Table13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1">
          <table:table-cell table:style-name="Table13.A11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2">
          <table:table-cell table:style-name="Table13.A12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-2903647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3">
          <table:table-cell table:style-name="Table13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4">
          <table:table-cell table:style-name="Table13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5">
          <table:table-cell table:style-name="Table13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3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3.16">
          <table:table-cell table:style-name="Table13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-1342157061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3.17">
          <table:table-cell table:style-name="Table13.A17" table:number-columns-spanned="2" office:value-type="string">
            <text:p text:style-name="P82" loext:marker-style-name="T227"/>
          </table:table-cell>
          <table:covered-table-cell/>
          <table:table-cell table:style-name="Table13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3.C18" office:value-type="string">
            <text:p text:style-name="P83" loext:marker-style-name="T29"><text:span text:style-name="T6"></text:span><text:span text:style-name="T228"/></text:p>
          </table:table-cell>
          <table:table-cell table:style-name="Table13.D18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942573197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3.C19" office:value-type="string">
            <text:p text:style-name="P83" loext:marker-style-name="T29"><text:span text:style-name="T6"></text:span><text:span text:style-name="T228"/></text:p>
          </table:table-cell>
          <table:table-cell table:style-name="Table13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3.F19" table:number-columns-spanned="2" office:value-type="string">
            <text:p text:style-name="P4" loext:marker-style-name="T29"><field:fieldmark-start text:name="__Fieldmark__8738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3.H19" office:value-type="string">
            <text:p text:style-name="P10" loext:marker-style-name="T29"><text:span text:style-name="T57">au</text:span><text:span text:style-name="T57"/></text:p>
          </table:table-cell>
          <table:table-cell table:style-name="Table13.I19" office:value-type="string">
            <text:p text:style-name="P4" loext:marker-style-name="T29"><field:fieldmark-start text:name="__Fieldmark__8758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3.20">
          <table:table-cell table:style-name="Table13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1">
          <table:table-cell table:style-name="Table13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2">
          <table:table-cell table:style-name="Table13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3.23">
          <table:table-cell table:style-name="Table13.A23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-139873394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 loext:marker-style-name="T27"/>
      <text:p text:style-name="P85" loext:marker-style-name="T2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B"/>
        <table:table-column table:style-name="Table14.H"/>
        <table:table-column table:style-name="Table14.I"/>
        <table:table-row table:style-name="Table14.1">
          <table:table-cell table:style-name="Table14.A1" office:value-type="string">
            <text:p text:style-name="P53" loext:marker-style-name="T53"/>
          </table:table-cell>
          <table:table-cell table:style-name="Table14.A1" table:number-columns-spanned="3" office:value-type="string">
            <text:p text:style-name="P54" loext:marker-style-name="T53"/>
          </table:table-cell>
          <table:covered-table-cell/>
          <table:covered-table-cell/>
          <table:table-cell table:style-name="Table14.A1" table:number-columns-spanned="5" office:value-type="string"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  <text:p text:style-name="P41" loext:marker-style-name="T45"/>
          </table:table-cell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1" office:value-type="string">
            <text:p text:style-name="P55" loext:marker-style-name="T53"><text:span text:style-name="T53">Activité-type</text:span></text:p>
          </table:table-cell>
          <table:table-cell table:style-name="Table14.A1" table:number-columns-spanned="3" office:value-type="string">
            <text:p text:style-name="P56" loext:marker-style-name="T53"><text:drop-down text:name=""><text:label text:current-selected="true" text:value="2"/><text:label text:value="3"/><text:label text:value="4"/><text:label text:value="5"/>2</text:drop-down></text:p>
          </table:table-cell>
          <table:covered-table-cell/>
          <table:covered-table-cell/>
          <table:table-cell table:style-name="Table14.A1" table:number-columns-spanned="5" office:value-type="string">
            <text:p text:style-name="P4" loext:marker-style-name="T29"><loext:content-control loext:plain-text="true" loext:alias="Intitulé de l'activité" loext:tag="Intitulé de l'activité" loext:id="-1100257371"><text:span text:style-name="T45">Développer la partie back-end d’une application web ou web mobile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4.3">
          <table:table-cell table:style-name="Table14.A3" table:number-columns-spanned="4" office:value-type="string">
            <text:p text:style-name="P57" loext:marker-style-name="T54"><text:span text:style-name="T55">Exemple n°8</text:span><text:span text:style-name="T54"> </text:span><text:span text:style-name="T6"></text:span></text:p>
          </table:table-cell>
          <table:covered-table-cell/>
          <table:covered-table-cell/>
          <table:covered-table-cell/>
          <table:table-cell table:style-name="Table14.E3" table:number-columns-spanned="5" office:value-type="string">
            <text:p text:style-name="P4" loext:marker-style-name="T56"><loext:content-control loext:plain-text="true" loext:id="326098746"><text:bookmark-start text:name="2.8 Documenter le déploiement d’une application dynamique web ou web mobile"/><text:span text:style-name="T27">Documenter le déploiement d’une application dynamique web ou web mobile</text:span><text:bookmark-end text:name="2.8 Documenter le déploiement d’une application dynamique web ou web mobile"/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14.3">
          <table:table-cell table:style-name="Table14.A4" table:number-columns-spanned="4" office:value-type="string">
            <text:p text:style-name="P58" loext:marker-style-name="T29"/>
          </table:table-cell>
          <table:covered-table-cell/>
          <table:covered-table-cell/>
          <table:covered-table-cell/>
          <table:table-cell table:style-name="Table14.E4" table:number-columns-spanned="5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</table:table-row>
        <table:table-row table:style-name="Table14.5">
          <table:table-cell table:style-name="Table14.A5" table:number-columns-spanned="9" office:value-type="string">
            <text:p text:style-name="P10" loext:marker-style-name="T29"><text:span text:style-name="T57">1. Décrivez les tâches ou opérations que vous avez effectuées, et dans quelles condition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6" table:number-columns-spanned="9" office:value-type="string">
            <text:p text:style-name="P74" loext:marker-style-name="T29"><loext:content-control loext:showing-place-holder="true" loext:plain-text="true" loext:alias="1.Décrire tâches effectuées" loext:tag="1.Décrire tâches effectuées" loext:id="787398401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7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8">
          <table:table-cell table:style-name="Table14.A8" table:number-columns-spanned="9" office:value-type="string">
            <text:p text:style-name="P10" loext:marker-style-name="T29"><text:span text:style-name="T57">2. Précisez les moyens utilisés :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4.9">
          <table:table-cell table:style-name="Table14.A9" table:number-columns-spanned="9" office:value-type="string">
            <text:p text:style-name="P74" loext:marker-style-name="T29"><loext:content-control loext:showing-place-holder="true" loext:plain-text="true" loext:alias="2.Préciser les moyens utilisés" loext:tag="2.Préciser les moyens utilisés" loext:id="-479612591"><text:span text:style-name="Placeholder_20_Text"><text:span text:style-name="T230">Cliquez ici pour taper du texte.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0">
          <table:table-cell table:style-name="Table14.A10" table:number-columns-spanned="9" office:value-type="string">
            <text:p text:style-name="P58" loext:marker-style-name="T29"/>
            <text:p text:style-name="P58" loext:marker-style-name="T29"/>
            <text:p text:style-name="P58" loext:marker-style-name="T29"/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1">
          <table:table-cell table:style-name="Table14.A11" table:number-columns-spanned="9" office:value-type="string">
            <text:p text:style-name="P10" loext:marker-style-name="T29"><text:span text:style-name="T57">3. Avec qui avez-vous travaillé ?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2">
          <table:table-cell table:style-name="Table14.A12" table:number-columns-spanned="9" office:value-type="string">
            <text:p text:style-name="P74" loext:marker-style-name="T29"><loext:content-control loext:showing-place-holder="true" loext:plain-text="true" loext:alias="3.Avec qui avez-vous travaillé ?" loext:tag="3.Avec qui avez-vous travaillé ?" loext:id="-777632880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3">
          <table:table-cell table:style-name="Table14.A13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4">
          <table:table-cell table:style-name="Table14.A14" table:number-columns-spanned="9" office:value-type="string">
            <text:p text:style-name="P10" loext:marker-style-name="T29"><text:span text:style-name="T57">4. Contexte</text:span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5">
          <table:table-cell table:style-name="Table14.A15" table:number-columns-spanned="6" office:value-type="string">
            <text:p text:style-name="P80" loext:marker-style-name="T223"/>
          </table:table-cell>
          <table:covered-table-cell/>
          <table:covered-table-cell/>
          <table:covered-table-cell/>
          <table:covered-table-cell/>
          <table:covered-table-cell/>
          <table:table-cell table:style-name="Table14.G15" table:number-columns-spanned="3" office:value-type="string">
            <text:p text:style-name="P81" loext:marker-style-name="T224"/>
          </table:table-cell>
          <table:covered-table-cell/>
          <table:covered-table-cell/>
        </table:table-row>
        <table:table-row table:style-name="Table14.16">
          <table:table-cell table:style-name="Table14.A16" table:number-columns-spanned="6" office:value-type="string">
            <text:p text:style-name="P4" loext:marker-style-name="T29"><text:span text:style-name="T29">Nom de l’entreprise, organisme ou association <text:s/></text:span><text:span text:style-name="T6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4.G16" table:number-columns-spanned="3" office:value-type="string">
            <text:p text:style-name="P4" loext:marker-style-name="T29"><loext:content-control loext:showing-place-holder="true" loext:plain-text="true" loext:alias="AT1 - Nom entreprise" loext:tag="AT1 - Nom entreprise" loext:id="1253700270"><text:span text:style-name="Placeholder_20_Text"><text:span text:style-name="T233">Cliquez ici pour taper du texte.</text:span></text:span></loext:content-control></text:p>
          </table:table-cell>
          <table:covered-table-cell/>
          <table:covered-table-cell/>
        </table:table-row>
        <table:table-row table:style-name="Table14.17">
          <table:table-cell table:style-name="Table14.A17" table:number-columns-spanned="2" office:value-type="string">
            <text:p text:style-name="P82" loext:marker-style-name="T227"/>
          </table:table-cell>
          <table:covered-table-cell/>
          <table:table-cell table:style-name="Table14.C17" table:number-columns-spanned="7" office:value-type="string">
            <text:p text:style-name="P82" loext:marker-style-name="T2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18" table:number-columns-spanned="2" office:value-type="string">
            <text:p text:style-name="P10" loext:marker-style-name="T29"><text:span text:style-name="T57">Chantier, atelier, service</text:span><text:span text:style-name="T57"/></text:p>
          </table:table-cell>
          <table:covered-table-cell/>
          <table:table-cell table:style-name="Table14.C18" office:value-type="string">
            <text:p text:style-name="P83" loext:marker-style-name="T29"><text:span text:style-name="T6"></text:span><text:span text:style-name="T228"/></text:p>
          </table:table-cell>
          <table:table-cell table:style-name="Table14.D18" table:number-columns-spanned="6" office:value-type="string">
            <text:p text:style-name="P4" loext:marker-style-name="T29"><loext:content-control loext:showing-place-holder="true" loext:plain-text="true" loext:alias="AT1 - Chantier" loext:tag="AT1 - Chantier" loext:id="2034604828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19" table:number-columns-spanned="2" office:value-type="string">
            <text:p text:style-name="P12" loext:marker-style-name="T29"><text:span text:style-name="T57">Période d’exercice</text:span><text:span text:style-name="T57"/></text:p>
          </table:table-cell>
          <table:covered-table-cell/>
          <table:table-cell table:style-name="Table14.C19" office:value-type="string">
            <text:p text:style-name="P83" loext:marker-style-name="T29"><text:span text:style-name="T6"></text:span><text:span text:style-name="T228"/></text:p>
          </table:table-cell>
          <table:table-cell table:style-name="Table14.D19" table:number-columns-spanned="2" office:value-type="string">
            <text:p text:style-name="P10" loext:marker-style-name="T29"><text:span text:style-name="T57">Du</text:span><text:span text:style-name="T57"/></text:p>
          </table:table-cell>
          <table:covered-table-cell/>
          <table:table-cell table:style-name="Table14.F19" table:number-columns-spanned="2" office:value-type="string">
            <text:p text:style-name="P4" loext:marker-style-name="T29"><field:fieldmark-start text:name="__Fieldmark__8973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</text:span><field:fieldmark-end/></text:p>
          </table:table-cell>
          <table:covered-table-cell/>
          <table:table-cell table:style-name="Table14.H19" office:value-type="string">
            <text:p text:style-name="P10" loext:marker-style-name="T29"><text:span text:style-name="T57">au</text:span><text:span text:style-name="T57"/></text:p>
          </table:table-cell>
          <table:table-cell table:style-name="Table14.I19" office:value-type="string">
            <text:p text:style-name="P4" loext:marker-style-name="T29"><field:fieldmark-start text:name="__Fieldmark__8993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</text:span><field:fieldmark-end/></text:p>
          </table:table-cell>
        </table:table-row>
        <table:table-row table:style-name="Table14.20">
          <table:table-cell table:style-name="Table14.A20" table:number-columns-spanned="9" office:value-type="string">
            <text:p text:style-name="P1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1">
          <table:table-cell table:style-name="Table14.A21" table:number-columns-spanned="9" office:value-type="string">
            <text:p text:style-name="P5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2">
          <table:table-cell table:style-name="Table14.A22" table:number-columns-spanned="9" office:value-type="string">
            <text:p text:style-name="P4" loext:marker-style-name="T55"><text:span text:style-name="T29">5. Informations complémentaires </text:span><text:span text:style-name="T2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4.23">
          <table:table-cell table:style-name="Table14.A23" table:number-columns-spanned="9" office:value-type="string">
            <text:p text:style-name="P74" loext:marker-style-name="T29"><loext:content-control loext:showing-place-holder="true" loext:plain-text="true" loext:alias="5.Informations complémentaires" loext:tag="5.Informations complémentaires" loext:id="264900736"><text:span text:style-name="Placeholder_20_Text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 loext:marker-style-name="T234"/>
      <text:p text:style-name="P89" loext:marker-style-name="T234"/>
      <text:p text:style-name="P89" loext:marker-style-name="T234"/>
      <text:p text:style-name="P89" loext:marker-style-name="T234"/>
      <text:p text:style-name="P47" loext:marker-style-name="T2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7" loext:marker-style-name="T10"><text:bookmark-start text:name="Titres diplomes CQP attestations de formation"/><text:span text:style-name="T11">Titres, diplômes, CQP, attestations de formation</text:span><text:bookmark-end text:name="Titres diplomes CQP attestations de formation"/></text:p>
          </table:table-cell>
          <table:covered-table-cell/>
          <table:covered-table-cell/>
        </table:table-row>
        <table:table-row table:style-name="Table15.2">
          <table:table-cell table:style-name="Table15.A2" table:number-columns-spanned="3" office:value-type="string">
            <text:p text:style-name="P8" loext:marker-style-name="T12"/>
          </table:table-cell>
          <table:covered-table-cell/>
          <table:covered-table-cell/>
        </table:table-row>
        <table:table-row table:style-name="Table15.3">
          <table:table-cell table:style-name="Table15.A3" table:number-columns-spanned="3" office:value-type="string">
            <text:p text:style-name="P32" loext:marker-style-name="T235"><text:span text:style-name="T236">(facultatif)</text:span><text:span text:style-name="T236"/></text:p>
            <text:p text:style-name="P93" loext:marker-style-name="T235"/>
            <text:p text:style-name="P94" loext:marker-style-name="T237"/>
          </table:table-cell>
          <table:covered-table-cell/>
          <table:covered-table-cell/>
        </table:table-row>
        <table:table-row table:style-name="Table15.1">
          <table:table-cell table:style-name="Table15.A4" office:value-type="string">
            <text:p text:style-name="P32" loext:marker-style-name="T1"><text:span text:style-name="T23">Intitulé</text:span><text:span text:style-name="T23"/></text:p>
          </table:table-cell>
          <table:table-cell table:style-name="Table15.B4" office:value-type="string">
            <text:p text:style-name="P32" loext:marker-style-name="T1"><text:span text:style-name="T23">Autorité ou organisme</text:span><text:span text:style-name="T23"/></text:p>
          </table:table-cell>
          <table:table-cell table:style-name="Table15.C4" office:value-type="string">
            <text:p text:style-name="P32" loext:marker-style-name="T1"><text:span text:style-name="T23">Date</text:span><text:span text:style-name="T23"/></text:p>
          </table:table-cell>
        </table:table-row>
        <table:table-row table:style-name="Table15.5">
          <table:table-cell table:style-name="Table15.A5" office:value-type="string">
            <text:p text:style-name="P95" loext:marker-style-name="T31"><loext:content-control loext:showing-place-holder="true" loext:plain-text="true" loext:alias="diplome" loext:tag="diplome" loext:id="-1815783948"><text:span text:style-name="Placeholder_20_Text">Cliquez ici.</text:span></loext:content-control></text:p>
          </table:table-cell>
          <table:table-cell table:style-name="Table15.B5" office:value-type="string">
            <text:p text:style-name="P95" loext:marker-style-name="T31"><loext:content-control loext:showing-place-holder="true" loext:plain-text="true" loext:alias="Organisme" loext:tag="Organisme" loext:id="1805660918"><text:span text:style-name="Placeholder_20_Text">Cliquez ici pour taper du texte.</text:span></loext:content-control></text:p>
          </table:table-cell>
          <table:table-cell table:style-name="Table15.C5" office:value-type="string">
            <text:p text:style-name="P96" loext:marker-style-name="T31"><field:fieldmark-start text:name="__Fieldmark__9083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6" office:value-type="string">
            <text:p text:style-name="P95" loext:marker-style-name="T31"><loext:content-control loext:showing-place-holder="true" loext:plain-text="true" loext:alias="diplome" loext:tag="diplome" loext:id="1892916534"><text:span text:style-name="Placeholder_20_Text">Cliquez ici.</text:span></loext:content-control></text:p>
          </table:table-cell>
          <table:table-cell table:style-name="Table15.B6" office:value-type="string">
            <text:p text:style-name="P95" loext:marker-style-name="T31"><loext:content-control loext:showing-place-holder="true" loext:plain-text="true" loext:alias="Organisme" loext:tag="Organisme" loext:id="2057810273"><text:span text:style-name="Placeholder_20_Text">Cliquez ici pour taper du texte.</text:span></loext:content-control></text:p>
          </table:table-cell>
          <table:table-cell table:style-name="Table15.C6" office:value-type="string">
            <text:p text:style-name="P9"><field:fieldmark-start text:name="__Fieldmark__9109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7" office:value-type="string">
            <text:p text:style-name="P95" loext:marker-style-name="T31"><loext:content-control loext:showing-place-holder="true" loext:plain-text="true" loext:alias="diplome" loext:tag="diplome" loext:id="-678578469"><text:span text:style-name="Placeholder_20_Text">Cliquez ici.</text:span></loext:content-control></text:p>
          </table:table-cell>
          <table:table-cell table:style-name="Table15.B7" office:value-type="string">
            <text:p text:style-name="P95" loext:marker-style-name="T31"><loext:content-control loext:showing-place-holder="true" loext:plain-text="true" loext:alias="Organisme" loext:tag="Organisme" loext:id="1374578029"><text:span text:style-name="Placeholder_20_Text">Cliquez ici pour taper du texte.</text:span></loext:content-control></text:p>
          </table:table-cell>
          <table:table-cell table:style-name="Table15.C7" office:value-type="string">
            <text:p text:style-name="P9"><field:fieldmark-start text:name="__Fieldmark__9135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8" office:value-type="string">
            <text:p text:style-name="P95" loext:marker-style-name="T31"><loext:content-control loext:showing-place-holder="true" loext:plain-text="true" loext:alias="diplome" loext:tag="diplome" loext:id="-1451628179"><text:span text:style-name="Placeholder_20_Text">Cliquez ici.</text:span></loext:content-control></text:p>
          </table:table-cell>
          <table:table-cell table:style-name="Table15.B8" office:value-type="string">
            <text:p text:style-name="P95" loext:marker-style-name="T31"><loext:content-control loext:showing-place-holder="true" loext:plain-text="true" loext:alias="Organisme" loext:tag="Organisme" loext:id="1800489748"><text:span text:style-name="Placeholder_20_Text">Cliquez ici pour taper du texte.</text:span></loext:content-control></text:p>
          </table:table-cell>
          <table:table-cell table:style-name="Table15.C8" office:value-type="string">
            <text:p text:style-name="P9"><field:fieldmark-start text:name="__Fieldmark__9161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9" office:value-type="string">
            <text:p text:style-name="P95" loext:marker-style-name="T31"><loext:content-control loext:showing-place-holder="true" loext:plain-text="true" loext:alias="diplome" loext:tag="diplome" loext:id="665603386"><text:span text:style-name="Placeholder_20_Text">Cliquez ici.</text:span></loext:content-control></text:p>
          </table:table-cell>
          <table:table-cell table:style-name="Table15.B9" office:value-type="string">
            <text:p text:style-name="P95" loext:marker-style-name="T31"><loext:content-control loext:showing-place-holder="true" loext:plain-text="true" loext:alias="Organisme" loext:tag="Organisme" loext:id="174456826"><text:span text:style-name="Placeholder_20_Text">Cliquez ici pour taper du texte.</text:span></loext:content-control></text:p>
          </table:table-cell>
          <table:table-cell table:style-name="Table15.C9" office:value-type="string">
            <text:p text:style-name="P9"><field:fieldmark-start text:name="__Fieldmark__918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10" office:value-type="string">
            <text:p text:style-name="P95" loext:marker-style-name="T31"><loext:content-control loext:showing-place-holder="true" loext:plain-text="true" loext:alias="diplome" loext:tag="diplome" loext:id="1780377363"><text:span text:style-name="Placeholder_20_Text">Cliquez ici.</text:span></loext:content-control></text:p>
          </table:table-cell>
          <table:table-cell table:style-name="Table15.B10" office:value-type="string">
            <text:p text:style-name="P95" loext:marker-style-name="T31"><loext:content-control loext:showing-place-holder="true" loext:plain-text="true" loext:alias="Organisme" loext:tag="Organisme" loext:id="-1551752405"><text:span text:style-name="Placeholder_20_Text">Cliquez ici pour taper du texte.</text:span></loext:content-control></text:p>
          </table:table-cell>
          <table:table-cell table:style-name="Table15.C10" office:value-type="string">
            <text:p text:style-name="P9"><field:fieldmark-start text:name="__Fieldmark__9213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11" office:value-type="string">
            <text:p text:style-name="P95" loext:marker-style-name="T31"><loext:content-control loext:showing-place-holder="true" loext:plain-text="true" loext:alias="diplome" loext:tag="diplome" loext:id="-1645741622"><text:span text:style-name="Placeholder_20_Text">Cliquez ici.</text:span></loext:content-control></text:p>
          </table:table-cell>
          <table:table-cell table:style-name="Table15.B11" office:value-type="string">
            <text:p text:style-name="P95" loext:marker-style-name="T31"><loext:content-control loext:showing-place-holder="true" loext:plain-text="true" loext:alias="Organisme" loext:tag="Organisme" loext:id="667283844"><text:span text:style-name="Placeholder_20_Text">Cliquez ici pour taper du texte.</text:span></loext:content-control></text:p>
          </table:table-cell>
          <table:table-cell table:style-name="Table15.C11" office:value-type="string">
            <text:p text:style-name="P9"><field:fieldmark-start text:name="__Fieldmark__9239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12" office:value-type="string">
            <text:p text:style-name="P95" loext:marker-style-name="T31"><loext:content-control loext:showing-place-holder="true" loext:plain-text="true" loext:alias="diplome" loext:tag="diplome" loext:id="341897966"><text:span text:style-name="Placeholder_20_Text">Cliquez ici.</text:span></loext:content-control></text:p>
          </table:table-cell>
          <table:table-cell table:style-name="Table15.B12" office:value-type="string">
            <text:p text:style-name="P95" loext:marker-style-name="T31"><loext:content-control loext:showing-place-holder="true" loext:plain-text="true" loext:alias="Organisme" loext:tag="Organisme" loext:id="29077316"><text:span text:style-name="Placeholder_20_Text">Cliquez ici pour taper du texte.</text:span></loext:content-control></text:p>
          </table:table-cell>
          <table:table-cell table:style-name="Table15.C12" office:value-type="string">
            <text:p text:style-name="P9"><field:fieldmark-start text:name="__Fieldmark__9265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13" office:value-type="string">
            <text:p text:style-name="P95" loext:marker-style-name="T31"><loext:content-control loext:showing-place-holder="true" loext:plain-text="true" loext:alias="diplome" loext:tag="diplome" loext:id="1872804284"><text:span text:style-name="Placeholder_20_Text">Cliquez ici.</text:span></loext:content-control></text:p>
          </table:table-cell>
          <table:table-cell table:style-name="Table15.B13" office:value-type="string">
            <text:p text:style-name="P95" loext:marker-style-name="T31"><loext:content-control loext:showing-place-holder="true" loext:plain-text="true" loext:alias="Organisme" loext:tag="Organisme" loext:id="-1280186761"><text:span text:style-name="Placeholder_20_Text">Cliquez ici pour taper du texte.</text:span></loext:content-control></text:p>
          </table:table-cell>
          <table:table-cell table:style-name="Table15.C13" office:value-type="string">
            <text:p text:style-name="P9"><field:fieldmark-start text:name="__Fieldmark__9291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  <table:table-row table:style-name="Table15.5">
          <table:table-cell table:style-name="Table15.A14" office:value-type="string">
            <text:p text:style-name="P95" loext:marker-style-name="T31"><loext:content-control loext:showing-place-holder="true" loext:plain-text="true" loext:alias="diplome" loext:tag="diplome" loext:id="1169910771"><text:span text:style-name="Placeholder_20_Text">Cliquez ici.</text:span></loext:content-control></text:p>
          </table:table-cell>
          <table:table-cell table:style-name="Table15.B14" office:value-type="string">
            <text:p text:style-name="P95" loext:marker-style-name="T31"><loext:content-control loext:showing-place-holder="true" loext:plain-text="true" loext:alias="Organisme" loext:tag="Organisme" loext:id="-1531720236"><text:span text:style-name="Placeholder_20_Text">Cliquez ici pour taper du texte.</text:span></loext:content-control></text:p>
          </table:table-cell>
          <table:table-cell table:style-name="Table15.C14" office:value-type="string">
            <text:p text:style-name="P9"><field:fieldmark-start text:name="__Fieldmark__9317_2448145832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Cliquez ici pour sélectionner une date.</text:span><field:fieldmark-end/></text:p>
          </table:table-cell>
        </table:table-row>
      </table:table>
      <text:p text:style-name="P89" loext:marker-style-name="T234"/>
      <text:p text:style-name="P51" loext:marker-style-name="T27"/>
      <text:p text:style-name="P51" loext:marker-style-name="T27"/>
      <text:p text:style-name="P51" loext:marker-style-name="T27"/>
      <text:p text:style-name="P51" loext:marker-style-name="T27"/>
      <text:p text:style-name="P97" loext:marker-style-name="T27"><text:span text:style-name="T28"><text:line-break/></text:span><text:span text:style-name="T28"/></text:p>
      <text:p text:style-name="P98" loext:marker-style-name="T234"/>
      <text:p text:style-name="P99" loext:marker-style-name="T234"/>
      <text:p text:style-name="P99" loext:marker-style-name="T23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 loext:marker-style-name="T10"><text:bookmark-start text:name="Déclaration sur l’honneur"/><text:span text:style-name="T11">Déclaration sur l’honneur</text:span><text:bookmark-end text:name="Déclaration sur l’honneur"/><text:span text:style-name="T11"/></text:p>
          </table:table-cell>
        </table:table-row>
        <table:table-row table:style-name="Table16.2">
          <table:table-cell table:style-name="Table16.A2" office:value-type="string">
            <text:p text:style-name="P8" loext:marker-style-name="T12"/>
          </table:table-cell>
        </table:table-row>
        <table:table-row table:style-name="Table16.3">
          <table:table-cell table:style-name="Table16.A3" office:value-type="string">
            <text:p text:style-name="P3" loext:marker-style-name="T3"/>
          </table:table-cell>
        </table:table-row>
      </table:table>
      <text:p text:style-name="P99" loext:marker-style-name="T234"/>
      <text:p text:style-name="P100" loext:marker-style-name="T50"/>
      <text:p text:style-name="P100" loext:marker-style-name="T50"/>
      <text:p text:style-name="P100" loext:marker-style-name="T50"><draw:custom-shape text:anchor-type="char" draw:z-index="62" draw:name="Zone de texte 2" draw:style-name="gr1" draw:text-style-name="P102" svg:width="10.053cm" svg:height="1.071cm" svg:x="5.584cm" svg:y="0.489cm"><text:p text:style-name="P101"><text:span text:style-name="T238">Eric Bouch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3" loext:marker-style-name="T50"><text:span text:style-name="T50">Je soussigné(e) <text:s/></text:span><text:span text:style-name="T239"><text:tab/></text:span><text:span text:style-name="T50">,</text:span></text:p>
      <text:p text:style-name="P104" loext:marker-style-name="T50"><text:span text:style-name="T240">déclare sur l’honneur que les renseignements fournis dans ce dossier sont exacts et que je suis l’auteur(e) des réalisations jointes.</text:span><text:span text:style-name="T240"/></text:p>
      <text:p text:style-name="P105" loext:marker-style-name="T50"/>
      <text:p text:style-name="P105" loext:marker-style-name="T50"><draw:custom-shape text:anchor-type="char" draw:z-index="66" draw:name="Zone de texte 2" draw:style-name="gr2" draw:text-style-name="P106" svg:width="8.229cm" svg:height="1.071cm" svg:x="1.005cm" svg:y="0.998cm"><text:p text:style-name="Frame_20_contents" loext:marker-style-name="T238"><loext:content-control loext:plain-text="true" loext:alias="Déclaration_fait à :" loext:tag="Déclaration_fait à :" loext:id="457456469"><text:span text:style-name="T241">Martigues.</text:span><text:span text:style-name="T242"/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height="20%" draw:z-index="63" draw:name="Zone de texte 2" draw:style-name="gr3" draw:text-style-name="P102" svg:width="6.083cm" svg:height="6.01cm" svg:x="9.795cm" svg:y="1.023cm"><text:p text:style-name="P101"><text:span text:style-name="T243">29</text:span><text:span text:style-name="T238">/04/202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7" loext:marker-style-name="T239"><text:span text:style-name="T50">Fait à </text:span><text:span text:style-name="T239"><text:tab/> </text:span><text:span text:style-name="T50">le</text:span><text:span text:style-name="T239"> <text:tab/></text:span></text:p>
      <text:p text:style-name="P108" loext:marker-style-name="T50"><text:span text:style-name="T240">pour faire valoir ce que de droit.</text:span><text:span text:style-name="T240"/></text:p>
      <text:p text:style-name="P105" loext:marker-style-name="T50"/>
      <text:p text:style-name="P109" loext:marker-style-name="T50"><text:span text:style-name="T50">Signature : <text:s text:c="3"/><text:tab/><text:tab/><text:tab/><text:tab/><text:tab/></text:span><text:span text:style-name="T244">Eric Bouchut</text:span></text:p>
      <text:p text:style-name="P100" loext:marker-style-name="T50"/>
      <text:p text:style-name="P51" loext:marker-style-name="T27"/>
      <text:p text:style-name="P51" loext:marker-style-name="T27"/>
      <text:p text:style-name="P47" loext:marker-style-name="T27"/>
      <text:p text:style-name="P90" loext:marker-style-name="T234"/>
      <text:p text:style-name="P89" loext:marker-style-name="T234"/>
      <text:p text:style-name="P89" loext:marker-style-name="T23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 loext:marker-style-name="T10"><text:bookmark-start text:name="Documents illustrant la pratique professionnelle"/><text:span text:style-name="T11">Documents illustrant la pratique professionnelle</text:span><text:bookmark-end text:name="Documents illustrant la pratique professionnelle"/></text:p>
          </table:table-cell>
        </table:table-row>
        <table:table-row table:style-name="Table17.2">
          <table:table-cell table:style-name="Table17.A2" office:value-type="string">
            <text:p text:style-name="P8" loext:marker-style-name="T12"/>
          </table:table-cell>
        </table:table-row>
        <table:table-row table:style-name="Table17.3">
          <table:table-cell table:style-name="Table17.A3" office:value-type="string">
            <text:p text:style-name="P32" loext:marker-style-name="T235"><text:span text:style-name="T236">(facultatif)</text:span><text:span text:style-name="T236"/></text:p>
            <text:p text:style-name="P93" loext:marker-style-name="T235"/>
            <text:p text:style-name="P93" loext:marker-style-name="T235"/>
          </table:table-cell>
        </table:table-row>
        <table:table-row table:style-name="Table17.1">
          <table:table-cell table:style-name="Table17.A4" office:value-type="string">
            <text:p text:style-name="P10" loext:marker-style-name="T1"><text:span text:style-name="T23">Intitulé</text:span><text:span text:style-name="T23"/></text:p>
          </table:table-cell>
        </table:table-row>
        <table:table-row table:style-name="Table17.5">
          <table:table-cell table:style-name="Table17.A5" office:value-type="string">
            <text:p text:style-name="P95" loext:marker-style-name="T31"><loext:content-control loext:showing-place-holder="true" loext:plain-text="true" loext:alias="Doc illustrant la pratique" loext:tag="Doc illustrant la pratique" loext:id="-731234241"><text:span text:style-name="Placeholder_20_Text">Cliquez ici pour taper du texte.</text:span></loext:content-control></text:p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5" office:value-type="string">
            <text:p text:style-name="P110" loext:marker-style-name="T31"/>
          </table:table-cell>
        </table:table-row>
        <table:table-row table:style-name="Table17.5">
          <table:table-cell table:style-name="Table17.A14" office:value-type="string">
            <text:p text:style-name="P110" loext:marker-style-name="T31"/>
          </table:table-cell>
        </table:table-row>
      </table:table>
      <text:p text:style-name="P89" loext:marker-style-name="T234"/>
      <text:p text:style-name="P51" loext:marker-style-name="T27"/>
      <text:p text:style-name="P51" loext:marker-style-name="T27"/>
      <text:p text:style-name="P51" loext:marker-style-name="T27"/>
      <text:p text:style-name="P51" loext:marker-style-name="T27"/>
      <text:p text:style-name="P111" loext:marker-style-name="T27"/>
      <text:p text:style-name="P51" loext:marker-style-name="T27"/>
      <text:p text:style-name="P51" loext:marker-style-name="T27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 loext:marker-style-name="T10"><text:bookmark-start text:name="Annexes"/><text:span text:style-name="T245">Annexes</text:span><text:bookmark-end text:name="Annexes"/><text:span text:style-name="T245"/></text:p>
          </table:table-cell>
        </table:table-row>
        <table:table-row table:style-name="Table19.2">
          <table:table-cell table:style-name="Table19.A2" office:value-type="string">
            <text:p text:style-name="P8" loext:marker-style-name="T12"/>
          </table:table-cell>
        </table:table-row>
        <table:table-row table:style-name="Table19.3">
          <table:table-cell table:style-name="Table19.A3" office:value-type="string">
            <text:p text:style-name="P32" loext:marker-style-name="T246"><text:span text:style-name="T236">(Si le RC le prévoit)</text:span><text:span text:style-name="T247"/></text:p>
          </table:table-cell>
        </table:table-row>
        <table:table-row table:style-name="Table19.3">
          <table:table-cell table:style-name="Table19.A4" office:value-type="string">
            <text:p text:style-name="P112" loext:marker-style-name="T27"/>
          </table:table-cell>
        </table:table-row>
      </table:table>
      <text:p text:style-name="P113" loext:marker-style-name="T27"><draw:custom-shape text:anchor-type="char" draw:z-index="67" draw:name="Forme automatique 2" draw:style-name="gr4" draw:text-style-name="P106" svg:width="1.317cm" svg:height="1.047cm" draw:transform="rotate (-1.5707963267949) translate (16.0408055555556cm 27.4298055555556cm)"><text:p text:style-name="P114" loext:marker-style-name="T248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Code_20_Block" style:display-name="Code Block" style:family="paragraph" style:parent-style-name="Preformatted_20_Text" style:next-style-name="Standard" style:master-page-name="">
      <loext:graphic-properties draw:fill="solid" draw:fill-color="#f5f5f5"/>
      <style:paragraph-properties fo:margin-left="0.499cm" fo:margin-right="0.499cm" fo:margin-top="0.199cm" fo:margin-bottom="0.199cm" style:contextual-spacing="false" style:page-number="auto" fo:background-color="#f5f5f5" fo:padding="0.15cm" fo:border="0.06pt solid #d0d0d0"/>
      <style:text-properties style:use-window-font-color="true" loext:opacity="0%" style:font-name="Courier New1" fo:font-family="'Courier New'" style:font-style-name="Regular" style:font-family-generic="modern" style:font-pitch="fixed" fo:font-size="9pt" style:font-name-asian="Courier New1" style:font-family-asian="'Courier New'" style:font-style-name-asian="Regular" style:font-family-generic-asian="modern" style:font-pitch-asian="fixed" style:font-size-asian="9pt"/>
    </style:style>
    <style:style style:name="Default_20_Paragraph_20_Font_20__28_WW_29_" style:display-name="Default Paragraph Font (WW)" style:family="text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/>
    <style:style style:name="Pied_20_de_20_page_20_Car" style:display-name="Pied de page Car" style:family="text" style:parent-style-name="Default_20_Paragraph_20_Font_20__28_WW_29_" loext:linked-style-name="Footer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Internet_20_link" style:display-name="Internet link" style:family="text" style:parent-style-name="Default_20_Paragraph_20_Font_20__28_WW_29_">
      <style:text-properties fo:color="#1a5fb4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3" style:family="table">
      <style:table-properties style:width="17.194cm" fo:margin-left="-0.691cm" fo:margin-top="0cm" fo:margin-bottom="0cm" table:align="left" style:writing-mode="lr-tb"/>
    </style:style>
    <style:style style:name="Table3.A" style:family="table-column">
      <style:table-column-properties style:column-width="3.563cm"/>
    </style:style>
    <style:style style:name="Table3.B" style:family="table-column">
      <style:table-column-properties style:column-width="5.207cm"/>
    </style:style>
    <style:style style:name="Table3.C" style:family="table-column">
      <style:table-column-properties style:column-width="4.205cm"/>
    </style:style>
    <style:style style:name="Table3.D" style:family="table-column">
      <style:table-column-properties style:column-width="4.219cm"/>
    </style:style>
    <style:style style:name="Table3.1" style:family="table-row">
      <style:table-row-properties style:min-row-height="0.4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3.2" style:family="table-row">
      <style:table-row-properties style:min-row-height="1.071cm" fo:keep-together="auto"/>
    </style:style>
    <style:style style:name="Table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3.3" style:family="table-row">
      <style:table-row-properties style:min-row-height="0.101cm" fo:keep-together="auto"/>
    </style:style>
    <style:style style:name="Table3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3.4" style:family="table-row">
      <style:table-row-properties style:min-row-height="1.199cm" fo:keep-together="auto"/>
    </style:style>
    <style:style style:name="Table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3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3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3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3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3.D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4" style:family="table">
      <style:table-properties style:width="17.194cm" fo:margin-left="-0.691cm" fo:margin-top="0cm" fo:margin-bottom="0cm" table:align="left" style:writing-mode="lr-tb"/>
    </style:style>
    <style:style style:name="Table4.A" style:family="table-column">
      <style:table-column-properties style:column-width="5.249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7.696cm"/>
    </style:style>
    <style:style style:name="Table4.1" style:family="table-row">
      <style:table-row-properties style:min-row-height="0.199cm" fo:keep-together="auto"/>
    </style:style>
    <style:style style:name="Table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4.2" style:family="table-row">
      <style:table-row-properties style:min-row-height="1.071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4.3" style:family="table-row">
      <style:table-row-properties style:min-row-height="0.101cm" fo:keep-together="auto"/>
    </style:style>
    <style:style style:name="Table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4.4" style:family="table-row">
      <style:table-row-properties style:min-row-height="0.801cm" fo:keep-together="auto"/>
    </style:style>
    <style:style style:name="Table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4.A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4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4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7" style:family="table">
      <style:table-properties style:width="17.194cm" fo:margin-left="-0.691cm" fo:margin-top="0cm" fo:margin-bottom="0cm" table:align="left" style:writing-mode="lr-tb"/>
    </style:style>
    <style:style style:name="Table7.A" style:family="table-column">
      <style:table-column-properties style:column-width="5.249cm"/>
    </style:style>
    <style:style style:name="Table7.B" style:family="table-column">
      <style:table-column-properties style:column-width="4.249cm"/>
    </style:style>
    <style:style style:name="Table7.C" style:family="table-column">
      <style:table-column-properties style:column-width="7.696cm"/>
    </style:style>
    <style:style style:name="Table7.1" style:family="table-row">
      <style:table-row-properties style:min-row-height="0.199cm" fo:keep-together="auto"/>
    </style:style>
    <style:style style:name="Table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7.2" style:family="table-row">
      <style:table-row-properties style:min-row-height="1.071cm" fo:keep-together="auto"/>
    </style:style>
    <style:style style:name="Table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7.3" style:family="table-row">
      <style:table-row-properties style:min-row-height="0.101cm" fo:keep-together="auto"/>
    </style:style>
    <style:style style:name="Table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7.4" style:family="table-row">
      <style:table-row-properties style:min-row-height="0.801cm" fo:keep-together="auto"/>
    </style:style>
    <style:style style:name="Table7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7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7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7.A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7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7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18" style:family="table">
      <style:table-properties style:width="17.14cm" fo:margin-left="-0.691cm" fo:margin-top="0cm" fo:margin-bottom="0cm" table:align="left" style:writing-mode="lr-tb"/>
    </style:style>
    <style:style style:name="Table18.A" style:family="table-column">
      <style:table-column-properties style:column-width="5.249cm"/>
    </style:style>
    <style:style style:name="Table18.B" style:family="table-column">
      <style:table-column-properties style:column-width="4.249cm"/>
    </style:style>
    <style:style style:name="Table18.C" style:family="table-column">
      <style:table-column-properties style:column-width="7.641cm"/>
    </style:style>
    <style:style style:name="Table18.1" style:family="table-row">
      <style:table-row-properties style:min-row-height="0.199cm" fo:keep-together="auto"/>
    </style:style>
    <style:style style:name="Table18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18.2" style:family="table-row">
      <style:table-row-properties style:min-row-height="1.071cm" fo:keep-together="auto"/>
    </style:style>
    <style:style style:name="Table18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18.3" style:family="table-row">
      <style:table-row-properties style:min-row-height="0.101cm" fo:keep-together="auto"/>
    </style:style>
    <style:style style:name="Table18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18.4" style:family="table-row">
      <style:table-row-properties style:min-row-height="0.801cm" fo:keep-together="auto"/>
    </style:style>
    <style:style style:name="Table18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8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8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8.A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18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18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20" style:family="table">
      <style:table-properties style:width="17.194cm" fo:margin-left="-0.691cm" fo:margin-top="0cm" fo:margin-bottom="0cm" table:align="left" style:writing-mode="lr-tb"/>
    </style:style>
    <style:style style:name="Table20.A" style:family="table-column">
      <style:table-column-properties style:column-width="5.249cm"/>
    </style:style>
    <style:style style:name="Table20.B" style:family="table-column">
      <style:table-column-properties style:column-width="4.249cm"/>
    </style:style>
    <style:style style:name="Table20.C" style:family="table-column">
      <style:table-column-properties style:column-width="7.696cm"/>
    </style:style>
    <style:style style:name="Table20.1" style:family="table-row">
      <style:table-row-properties style:min-row-height="0.199cm" fo:keep-together="auto"/>
    </style:style>
    <style:style style:name="Table20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20.2" style:family="table-row">
      <style:table-row-properties style:min-row-height="1.071cm" fo:keep-together="auto"/>
    </style:style>
    <style:style style:name="Table20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20.3" style:family="table-row">
      <style:table-row-properties style:min-row-height="0.101cm" fo:keep-together="auto"/>
    </style:style>
    <style:style style:name="Table20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20.4" style:family="table-row">
      <style:table-row-properties style:min-row-height="0.801cm" fo:keep-together="auto"/>
    </style:style>
    <style:style style:name="Table20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20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20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20.A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20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20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1" style:font-size-complex="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right" style:justify-single-word="false" fo:orphans="2" fo:widows="2"/>
      <style:text-properties fo:color="#ffffff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light1" loext:color-type="theme"/>
      </style:text-properties>
    </style:style>
    <style:style style:name="MP7" style:family="paragraph" style:parent-style-name="Footer">
      <style:paragraph-properties fo:margin-left="-0.751cm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8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/>
    </style:style>
    <style:style style:name="MP9" style:family="paragraph">
      <loext:graphic-properties draw:fill="none"/>
      <style:paragraph-properties fo:text-align="left"/>
      <style:text-properties fo:font-size="18pt"/>
    </style:style>
    <style:style style:name="MP10" style:family="paragraph" style:parent-style-name="Frame_20_contents">
      <style:paragraph-properties fo:margin-right="-0.101cm" fo:margin-top="0cm" fo:margin-bottom="0cm" style:contextual-spacing="false" fo:line-height="120%" fo:text-align="right" style:justify-single-word="false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style:font-size-asian="24pt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style:font-size-asian="22pt" style:font-name-complex="Calibri1" style:font-size-complex="22pt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style:font-name="Wingdings 3" fo:font-size="24pt" style:font-size-asian="24pt" style:font-name-complex="Calibri1" style:font-size-complex="24pt"/>
    </style:style>
    <style:style style:name="MT9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0" style:family="text">
      <style:text-properties fo:color="#404040" loext:opacity="100%" fo:font-family="Cambria" style:font-family-generic="roman" style:font-pitch="variable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T11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2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3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5" style:family="text">
      <style:text-properties fo:font-variant="small-caps" fo:color="#595959" loext:opacity="100%" style:text-position="21% 100%" fo:font-size="14pt" style:font-size-asian="14pt" style:font-name-complex="Calibri1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6" style:family="text">
      <style:text-properties fo:font-variant="small-caps" style:font-name="Arial" fo:font-size="16pt" style:font-size-asian="16pt" style:font-name-complex="Arial1" style:font-size-complex="16pt"/>
    </style:style>
    <style:style style:name="MT17" style:family="text">
      <style:text-properties style:font-name="Wingdings 3" fo:font-size="16pt" style:font-size-asian="16pt" style:font-name-complex="Calibri1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12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>
        <loext:stroke-complex-color loext:theme-type="light1" loext:color-type="theme">
          <loext:transformation loext:type="lummod" loext:value="8500"/>
        </loext:stroke-complex-color>
      </style:graphic-properties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1" loext:marker-style-name="MT1"><draw:frame draw:style-name="Mfr1" draw:name="Image 3" text:anchor-type="as-char" svg:width="3.186cm" svg:height="3.572cm" draw:z-index="127"><draw:image xlink:href="Pictures/1000000000000287000002D7DB578223.jpg" xlink:type="simple" xlink:show="embed" xlink:actuate="onLoad" draw:mime-type="image/jpeg"/><svg:desc>charge_de_emploi_CMJN</svg:desc></draw:frame></text:p>
            </table:table-cell>
            <table:table-cell table:style-name="Table3.B1" office:value-type="string">
              <text:p text:style-name="MP2" loext:marker-style-name="MT2"/>
            </table:table-cell>
            <table:table-cell table:style-name="Table3.B1" office:value-type="string">
              <text:p text:style-name="MP2" loext:marker-style-name="MT2"/>
            </table:table-cell>
            <table:table-cell table:style-name="Table3.B1" office:value-type="string">
              <text:p text:style-name="MP2" loext:marker-style-name="MT2"/>
            </table:table-cell>
          </table:table-row>
          <table:table-row table:style-name="Table3.2">
            <table:covered-table-cell table:style-name="Table3.A1"/>
            <table:table-cell table:style-name="Table3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3.3">
            <table:covered-table-cell table:style-name="Table3.A1"/>
            <table:table-cell table:style-name="Table3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3.4">
            <table:covered-table-cell table:style-name="Table3.A1"/>
            <table:table-cell table:style-name="Table3.B4" office:value-type="string">
              <text:p text:style-name="MP5" loext:marker-style-name="MT1"/>
            </table:table-cell>
            <table:table-cell table:style-name="Table3.C4" office:value-type="string">
              <text:p text:style-name="MP5" loext:marker-style-name="MT1"/>
            </table:table-cell>
            <table:table-cell table:style-name="Table3.D4" office:value-type="string">
              <text:p text:style-name="MP6" loext:marker-style-name="MT1"><text:span text:style-name="MT8"></text:span><text:span text:style-name="MT1"/></text:p>
            </table:table-cell>
          </table:table-row>
          <table:table-row table:style-name="Table3.3">
            <table:covered-table-cell table:style-name="Table3.A1"/>
            <table:table-cell table:style-name="Table3.B5" office:value-type="string">
              <text:p text:style-name="MP4" loext:marker-style-name="MT7"/>
            </table:table-cell>
            <table:table-cell table:style-name="Table3.C5" office:value-type="string">
              <text:p text:style-name="MP4" loext:marker-style-name="MT7"/>
            </table:table-cell>
            <table:table-cell table:style-name="Table3.D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9"><draw:custom-shape text:anchor-type="char" draw:z-index="26" draw:name="Forme automatique 2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1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27" draw:name="Forme automatique 2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  <style:master-page style:name="Converted1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4" loext:marker-style-name="MT7"/>
            </table:table-cell>
            <table:table-cell table:style-name="Table4.A1" office:value-type="string">
              <text:p text:style-name="MP4" loext:marker-style-name="MT7"/>
            </table:table-cell>
            <table:table-cell table:style-name="Table4.A1" office:value-type="string">
              <text:p text:style-name="MP4" loext:marker-style-name="MT7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3" loext:marker-style-name="MT3"><text:span text:style-name="MT14">Dossier Professionnel</text:span><text:span text:style-name="MT5"> </text:span><text:span text:style-name="MT15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4.4">
            <table:table-cell table:style-name="Table4.A4" office:value-type="string">
              <text:p text:style-name="MP5" loext:marker-style-name="MT1"/>
            </table:table-cell>
            <table:table-cell table:style-name="Table4.B4" office:value-type="string">
              <text:p text:style-name="MP5" loext:marker-style-name="MT1"/>
            </table:table-cell>
            <table:table-cell table:style-name="Table4.C4" office:value-type="string">
              <text:p text:style-name="MP6" loext:marker-style-name="MT16"><text:span text:style-name="MT17"></text:span><text:span text:style-name="MT16"/></text:p>
            </table:table-cell>
          </table:table-row>
          <table:table-row table:style-name="Table4.3">
            <table:table-cell table:style-name="Table4.A5" office:value-type="string">
              <text:p text:style-name="MP4" loext:marker-style-name="MT7"/>
            </table:table-cell>
            <table:table-cell table:style-name="Table4.B5" office:value-type="string">
              <text:p text:style-name="MP4" loext:marker-style-name="MT7"/>
            </table:table-cell>
            <table:table-cell table:style-name="Table4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9"><draw:custom-shape text:anchor-type="char" draw:z-index="28" draw:name="Forme automatique 1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29" draw:name="Forme automatique 3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2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  <style:master-page style:name="Converted2" style:page-layout-name="Mpm2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 loext:marker-style-name="MT7"/>
            </table:table-cell>
            <table:table-cell table:style-name="Table7.A1" office:value-type="string">
              <text:p text:style-name="MP4" loext:marker-style-name="MT7"/>
            </table:table-cell>
            <table:table-cell table:style-name="Table7.A1" office:value-type="string">
              <text:p text:style-name="MP4" loext:marker-style-name="MT7"/>
            </table:table-cell>
          </table:table-row>
          <table:table-row table:style-name="Table7.2">
            <table:table-cell table:style-name="Table7.A2" table:number-columns-spanned="3" office:value-type="string">
              <text:p text:style-name="MP3" loext:marker-style-name="MT3"><text:span text:style-name="MT14">Dossier Professionnel</text:span><text:span text:style-name="MT5"> </text:span><text:span text:style-name="MT15">(DP)</text:span></text:p>
            </table:table-cell>
            <table:covered-table-cell/>
            <table:covered-table-cell/>
          </table:table-row>
          <table:table-row table:style-name="Table7.3">
            <table:table-cell table:style-name="Table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7.4">
            <table:table-cell table:style-name="Table7.A4" office:value-type="string">
              <text:p text:style-name="MP5" loext:marker-style-name="MT1"/>
            </table:table-cell>
            <table:table-cell table:style-name="Table7.B4" office:value-type="string">
              <text:p text:style-name="MP5" loext:marker-style-name="MT1"/>
            </table:table-cell>
            <table:table-cell table:style-name="Table7.C4" office:value-type="string">
              <text:p text:style-name="MP6" loext:marker-style-name="MT16"><text:span text:style-name="MT17"></text:span></text:p>
            </table:table-cell>
          </table:table-row>
          <table:table-row table:style-name="Table7.3">
            <table:table-cell table:style-name="Table7.A5" office:value-type="string">
              <text:p text:style-name="MP4" loext:marker-style-name="MT7"/>
            </table:table-cell>
            <table:table-cell table:style-name="Table7.B5" office:value-type="string">
              <text:p text:style-name="MP4" loext:marker-style-name="MT7"/>
            </table:table-cell>
            <table:table-cell table:style-name="Table7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9"><draw:custom-shape text:anchor-type="char" draw:z-index="30" draw:name="Forme automatique 4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31" draw:name="Forme automatique 5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3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  <style:master-page style:name="Converted3" style:page-layout-name="Mpm2" draw:style-name="Mdp1">
      <style:header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MP4" loext:marker-style-name="MT7"/>
            </table:table-cell>
            <table:table-cell table:style-name="Table18.A1" office:value-type="string">
              <text:p text:style-name="MP4" loext:marker-style-name="MT7"/>
            </table:table-cell>
            <table:table-cell table:style-name="Table18.A1" office:value-type="string">
              <text:p text:style-name="MP4" loext:marker-style-name="MT7"/>
            </table:table-cell>
          </table:table-row>
          <table:table-row table:style-name="Table18.2">
            <table:table-cell table:style-name="Table18.A2" table:number-columns-spanned="3" office:value-type="string">
              <text:p text:style-name="MP3" loext:marker-style-name="MT3"><text:span text:style-name="MT14">Dossier Professionnel</text:span><text:span text:style-name="MT5"> </text:span><text:span text:style-name="MT15">(DP)</text:span></text:p>
            </table:table-cell>
            <table:covered-table-cell/>
            <table:covered-table-cell/>
          </table:table-row>
          <table:table-row table:style-name="Table18.3">
            <table:table-cell table:style-name="Table18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18.4">
            <table:table-cell table:style-name="Table18.A4" office:value-type="string">
              <text:p text:style-name="MP5" loext:marker-style-name="MT1"/>
            </table:table-cell>
            <table:table-cell table:style-name="Table18.B4" office:value-type="string">
              <text:p text:style-name="MP5" loext:marker-style-name="MT1"/>
            </table:table-cell>
            <table:table-cell table:style-name="Table18.C4" office:value-type="string">
              <text:p text:style-name="MP6" loext:marker-style-name="MT16"><text:span text:style-name="MT17"></text:span></text:p>
            </table:table-cell>
          </table:table-row>
          <table:table-row table:style-name="Table18.3">
            <table:table-cell table:style-name="Table18.A5" office:value-type="string">
              <text:p text:style-name="MP4" loext:marker-style-name="MT7"/>
            </table:table-cell>
            <table:table-cell table:style-name="Table18.B5" office:value-type="string">
              <text:p text:style-name="MP4" loext:marker-style-name="MT7"/>
            </table:table-cell>
            <table:table-cell table:style-name="Table18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9"><draw:custom-shape text:anchor-type="char" draw:z-index="25" draw:name="Forme automatique 6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59" draw:name="Forme automatique 7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29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  <style:master-page style:name="Converted4" style:page-layout-name="Mpm2" draw:style-name="Mdp1">
      <style:header>
        <table:table table:name="Table20" table:style-name="Table20">
          <table:table-column table:style-name="Table20.A"/>
          <table:table-column table:style-name="Table20.B"/>
          <table:table-column table:style-name="Table20.C"/>
          <table:table-row table:style-name="Table20.1">
            <table:table-cell table:style-name="Table20.A1" office:value-type="string">
              <text:p text:style-name="MP4" loext:marker-style-name="MT7"/>
            </table:table-cell>
            <table:table-cell table:style-name="Table20.A1" office:value-type="string">
              <text:p text:style-name="MP4" loext:marker-style-name="MT7"/>
            </table:table-cell>
            <table:table-cell table:style-name="Table20.A1" office:value-type="string">
              <text:p text:style-name="MP4" loext:marker-style-name="MT7"/>
            </table:table-cell>
          </table:table-row>
          <table:table-row table:style-name="Table20.2">
            <table:table-cell table:style-name="Table20.A2" table:number-columns-spanned="3" office:value-type="string">
              <text:p text:style-name="MP3" loext:marker-style-name="MT3"><text:span text:style-name="MT14">Dossier Professionnel</text:span><text:span text:style-name="MT5"> </text:span><text:span text:style-name="MT15">(DP)</text:span></text:p>
            </table:table-cell>
            <table:covered-table-cell/>
            <table:covered-table-cell/>
          </table:table-row>
          <table:table-row table:style-name="Table20.3">
            <table:table-cell table:style-name="Table20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20.4">
            <table:table-cell table:style-name="Table20.A4" office:value-type="string">
              <text:p text:style-name="MP5" loext:marker-style-name="MT1"/>
            </table:table-cell>
            <table:table-cell table:style-name="Table20.B4" office:value-type="string">
              <text:p text:style-name="MP5" loext:marker-style-name="MT1"/>
            </table:table-cell>
            <table:table-cell table:style-name="Table20.C4" office:value-type="string">
              <text:p text:style-name="MP6" loext:marker-style-name="MT16"><text:span text:style-name="MT17"></text:span></text:p>
            </table:table-cell>
          </table:table-row>
          <table:table-row table:style-name="Table20.3">
            <table:table-cell table:style-name="Table20.A5" office:value-type="string">
              <text:p text:style-name="MP4" loext:marker-style-name="MT7"/>
            </table:table-cell>
            <table:table-cell table:style-name="Table20.B5" office:value-type="string">
              <text:p text:style-name="MP4" loext:marker-style-name="MT7"/>
            </table:table-cell>
            <table:table-cell table:style-name="Table20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9"><draw:custom-shape text:anchor-type="char" draw:z-index="60" draw:name="Forme automatique 8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33" draw:name="Forme automatique 9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30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  <style:master-page style:name="Converted5" style:page-layout-name="Mpm2" draw:style-name="Mdp1">
      <style:header>
        <text:p text:style-name="Header"/>
      </style:header>
      <style:footer>
        <text:p text:style-name="MP7" loext:marker-style-name="MT9"><draw:custom-shape text:anchor-type="char" draw:z-index="32" draw:name="Forme automatique 10" draw:style-name="Mgr2" draw:text-style-name="MP9" svg:width="0.989cm" svg:height="1.668cm" draw:transform="rotate (-1.5707963267949) translate (15.8961666666667cm 27.5997638888889cm)"><text:p text:style-name="MP10" loext:marker-style-name="MT10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draw:custom-shape text:anchor-type="char" draw:z-index="61" draw:name="Forme automatique 11" draw:style-name="Mgr1" draw:text-style-name="MP9" svg:width="1.317cm" svg:height="1.047cm" draw:transform="rotate (-1.5707963267949) translate (16.0002361111111cm 27.3976805555556cm)"><text:p text:style-name="MP8" loext:marker-style-name="MT10"><text:span text:style-name="MT10"><text:page-number text:select-page="current">31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position-x="0" draw:handle-position-y="?f2" draw:handle-range-y-minimum="0"/></draw:enhanced-geometry></draw:custom-shape><text:span text:style-name="MT11"><text:s/></text:span><text:span text:style-name="MT9">DOSSIER PROFESSIONNEL-Version du 01/06/2016</text:span><text:span text:style-name="MT12"> </text:span><text:span text:style-name="MT13"><text:tab/>Page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onquet Miguel</meta:initial-creator>
    <meta:editing-cycles>32</meta:editing-cycles>
    <meta:print-date>2026-05-20T14:24:25.480149000</meta:print-date>
    <meta:creation-date>2016-11-28T15:40:00</meta:creation-date>
    <dc:date>2026-05-20T16:37:49.075781000</dc:date>
    <meta:editing-duration>P2DT2H23M55S</meta:editing-duration>
    <meta:generator>LibreOffice/26.2.3.2$MacOSX_AARCH64 LibreOffice_project/70e089b17412e4cb7773e41413306b17a2328c34</meta:generator>
    <meta:printed-by>PDF files: Eric Bouchut</meta:printed-by>
    <dc:creator>Eric Bouchut</dc:creator>
    <meta:document-statistic meta:table-count="20" meta:image-count="1" meta:object-count="0" meta:page-count="31" meta:paragraph-count="380" meta:word-count="2609" meta:character-count="16602" meta:non-whitespace-character-count="14204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